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19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3">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196" style:parent-style-name="Graphics">
      <style:graphic-properties draw:fill="none" draw:stroke="non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215e99"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1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91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8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8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8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80%" fo:text-align="left" style:tab-stop-distance="1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80%" fo:text-align="left" style:tab-stop-distance="1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80%" fo:text-align="left" style:tab-stop-distance="1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05" style:parent-style-name="Graphics">
      <style:graphic-properties draw:fill="none" fo:clip="rect(1.5567in, 0in, 0in, 0in)" draw:stroke="none"/>
    </style:style>
    <style:style style:family="paragraph" style:name="a94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31">
      <style:paragraph-properties fo:line-height="80%" fo:text-align="left" style:tab-stop-distance="1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215e99"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34" style:parent-style-name="Graphics">
      <style:graphic-properties draw:fill="none" fo:clip="rect(0.52699in, 11.85768in, 0.36581in, 3.04484in)" draw:stroke="none"/>
    </style:style>
    <style:style style:family="paragraph" style:name="a94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draw:fill="none" draw:stroke="solid" svg:stroke-width="0.01389in" svg:stroke-color="#000000" svg:stroke-opacity="100%"/>
    </style:style>
    <style:style style:family="graphic" style:name="a9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215e99"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9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draw:fill="none" draw:stroke="solid" svg:stroke-width="0.01389in" svg:stroke-color="#000000" svg:stroke-opacity="100%"/>
    </style:style>
    <style:style style:family="presentation" style:name="a9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215e99"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6">
      <style:text-properties fo:font-variant="normal" fo:text-transform="none" fo:color="#215e99"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215e99"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215e99"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36" style:parent-style-name="Graphics">
      <style:graphic-properties draw:fill="none" fo:clip="rect(0in, 0.00011in, 0.33286in, 0in)" draw:stroke="non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0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215e99"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parent-style-name="Graphics">
      <style:graphic-properties draw:fill="none" draw:stroke="non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215f9a" style:text-line-through-type="none" style:text-line-through-style="none" style:text-line-through-width="auto" style:text-line-through-color="font-color" style:text-position="0% 100%" fo:font-family="Aptos Display"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30">
      <style:text-properties fo:font-variant="normal" fo:text-transform="none" fo:color="#215f9a" style:text-line-through-type="none" style:text-line-through-style="none" style:text-line-through-width="auto" style:text-line-through-color="font-color" style:text-position="0% 100%" fo:font-family="Aptos Display"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74">
      <style:graphic-properties draw:fill="none" draw:stroke="solid" svg:stroke-width="0.01389in" svg:stroke-color="#000000" svg:stroke-opacity="100%"/>
    </style:style>
    <style:style style:family="paragraph" style:name="a1263">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parent-style-name="Graphics">
      <style:graphic-properties draw:fill="none" fo:clip="rect(2.04242in, 0in, 0in, 0in)" draw:stroke="none"/>
    </style:style>
    <style:style style:family="graphic" style:name="a9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215e99"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1" style:parent-style-name="Graphics">
      <style:graphic-properties draw:fill="none" fo:clip="rect(0in, 0in, 0.40877in, 0in)" draw:stroke="non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7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0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parent-style-name="Graphics">
      <style:graphic-properties draw:fill="none" draw:stroke="non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3">
      <style:text-properties fo:font-variant="normal" fo:text-transform="none" fo:color="#215e99"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215e99"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89">
      <style:paragraph-properties fo:line-height="11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draw:fill="none" draw:stroke="solid" svg:stroke-width="0.01389in" svg:stroke-color="#000000" svg:stroke-opacity="100%"/>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6">
      <style:text-properties fo:font-variant="normal" fo:text-transform="none" fo:color="#215e99"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1">
      <style:text-properties fo:font-variant="normal" fo:text-transform="none" fo:color="#215e99" style:text-line-through-type="none" style:text-line-through-style="none" style:text-line-through-width="auto" style:text-line-through-color="font-color" style:text-position="0% 100%" fo:font-family="Aptos Display" fo:font-size="0.56944in" style:font-size-asian="0.56944in" style:font-size-complex="0.569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ptos Display" fo:font-size="0.56944in" style:font-size-asian="0.56944in" style:font-size-complex="0.5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3">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draw:fill="none" draw:stroke="solid" svg:stroke-width="0.01389in" svg:stroke-color="#000000" svg:stroke-opacity="100%"/>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93" style:parent-style-name="Graphics">
      <style:graphic-properties draw:fill="none" draw:stroke="none"/>
    </style:style>
    <style:style style:family="drawing-page" style:name="a8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215e99"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215e99"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9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8">
      <style:graphic-properties draw:fill="none" draw:stroke="non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Aptos" style:font-family-asian="Calibri" style:font-family-complex="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1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103">
      <style:paragraph-properties fo:line-height="11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1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19">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9">
      <style:graphic-properties draw:fill="none" draw:stroke="solid" svg:stroke-width="0.01389in" svg:stroke-color="#000000" svg:stroke-opacity="100%"/>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6">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6" style:parent-style-name="Graphics">
      <style:graphic-properties draw:fill="none" fo:clip="rect(0in, 0in, 3.85685in, 0in)" draw:stroke="non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7" style:parent-style-name="Graphics">
      <style:graphic-properties draw:fill="none" fo:clip="rect(0in, 0in, 4.56813in, 0in)" draw:stroke="none"/>
    </style:style>
    <style:style style:family="paragraph" style:name="a1360">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parent-style-name="Graphics">
      <style:graphic-properties draw:fill="none" fo:clip="rect(2.09195in, 0in, 1.60688in, 0in)" draw:stroke="non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7">
      <style:text-properties fo:font-variant="normal" fo:text-transform="none" fo:color="#215e99"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215e99"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5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14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7" style:parent-style-name="Graphics">
      <style:graphic-properties draw:fill="none" draw:stroke="none"/>
    </style:style>
    <style:style style:family="presentation" style:name="a1148">
      <style:graphic-properties draw:fill="none" draw:stroke="solid" svg:stroke-width="0.01389in" svg:stroke-color="#000000" svg:stroke-opacity="100%"/>
    </style:style>
    <style:style style:family="paragraph" style:name="a137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215e99"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215e99"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81">
      <style:graphic-properties draw:fill="none" draw:stroke="solid" svg:stroke-width="0.01389in" svg:stroke-color="#000000" svg:stroke-opacity="100%"/>
    </style:style>
    <style:style style:family="paragraph" style:name="a1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8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4">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parent-style-name="Graphics">
      <style:graphic-properties draw:fill="none" fo:clip="rect(0in, 0in, 5.00784in, 0in)" draw:stroke="none"/>
    </style:style>
    <style:style style:family="graphic" style:name="a897" style:parent-style-name="Graphics">
      <style:graphic-properties draw:fill="none" draw:stroke="non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4">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1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2">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3">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1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9">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1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3">
      <text:list-level-style-number text:level="1" style:num-format="1" style:num-suffix="." style:num-list-format-name="" text:start-value="6">
        <style:list-level-properties text:space-before="0in" text:min-label-width="0.5625in"/>
        <style:text-properties fo:font-family="Aptos Display" fo:font-size="100%"/>
      </text:list-level-style-number>
      <text:list-level-style-number text:level="2" style:num-format="1" style:num-suffix="." style:num-list-format-name="" text:start-value="6">
        <style:list-level-properties text:space-before="0.5in" text:min-label-width="0.5625in"/>
        <style:text-properties fo:font-family="Aptos Display" fo:font-size="100%"/>
      </text:list-level-style-number>
      <text:list-level-style-number text:level="3" style:num-format="1" style:num-suffix="." style:num-list-format-name="" text:start-value="6">
        <style:list-level-properties text:space-before="1in" text:min-label-width="0.5625in"/>
        <style:text-properties fo:font-family="Aptos Display" fo:font-size="100%"/>
      </text:list-level-style-number>
      <text:list-level-style-number text:level="4" style:num-format="1" style:num-suffix="." style:num-list-format-name="" text:start-value="6">
        <style:list-level-properties text:space-before="1.5in" text:min-label-width="0.5625in"/>
        <style:text-properties fo:font-family="Aptos Display" fo:font-size="100%"/>
      </text:list-level-style-number>
      <text:list-level-style-number text:level="5" style:num-format="1" style:num-suffix="." style:num-list-format-name="" text:start-value="6">
        <style:list-level-properties text:space-before="2in" text:min-label-width="0.5625in"/>
        <style:text-properties fo:font-family="Aptos Display" fo:font-size="100%"/>
      </text:list-level-style-number>
      <text:list-level-style-number text:level="6" style:num-format="1" style:num-suffix="." style:num-list-format-name="" text:start-value="6">
        <style:list-level-properties text:space-before="2.5in" text:min-label-width="0.5625in"/>
        <style:text-properties fo:font-family="Aptos Display" fo:font-size="100%"/>
      </text:list-level-style-number>
      <text:list-level-style-number text:level="7" style:num-format="1" style:num-suffix="." style:num-list-format-name="" text:start-value="6">
        <style:list-level-properties text:space-before="3in" text:min-label-width="0.5625in"/>
        <style:text-properties fo:font-family="Aptos Display" fo:font-size="100%"/>
      </text:list-level-style-number>
      <text:list-level-style-number text:level="8" style:num-format="1" style:num-suffix="." style:num-list-format-name="" text:start-value="6">
        <style:list-level-properties text:space-before="3.5in" text:min-label-width="0.5625in"/>
        <style:text-properties fo:font-family="Aptos Display" fo:font-size="100%"/>
      </text:list-level-style-number>
      <text:list-level-style-number text:level="9" style:num-format="1" style:num-suffix="." style:num-list-format-name="" text:start-value="6">
        <style:list-level-properties text:space-before="4in" text:min-label-width="0.5625in"/>
        <style:text-properties fo:font-family="Aptos Display" fo:font-size="100%"/>
      </text:list-level-style-number>
    </text:list-style>
    <text:list-style style:name="a122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6">
      <text:list-level-style-number text:level="1" style:num-format="1" style:num-suffix="." style:num-list-format-name="" text:start-value="6">
        <style:list-level-properties text:space-before="0in" text:min-label-width="0.5625in"/>
        <style:text-properties fo:font-family="Aptos Display" fo:font-size="100%"/>
      </text:list-level-style-number>
      <text:list-level-style-number text:level="2" style:num-format="1" style:num-suffix="." style:num-list-format-name="" text:start-value="6">
        <style:list-level-properties text:space-before="0.5in" text:min-label-width="0.5625in"/>
        <style:text-properties fo:font-family="Aptos Display" fo:font-size="100%"/>
      </text:list-level-style-number>
      <text:list-level-style-number text:level="3" style:num-format="1" style:num-suffix="." style:num-list-format-name="" text:start-value="6">
        <style:list-level-properties text:space-before="1in" text:min-label-width="0.5625in"/>
        <style:text-properties fo:font-family="Aptos Display" fo:font-size="100%"/>
      </text:list-level-style-number>
      <text:list-level-style-number text:level="4" style:num-format="1" style:num-suffix="." style:num-list-format-name="" text:start-value="6">
        <style:list-level-properties text:space-before="1.5in" text:min-label-width="0.5625in"/>
        <style:text-properties fo:font-family="Aptos Display" fo:font-size="100%"/>
      </text:list-level-style-number>
      <text:list-level-style-number text:level="5" style:num-format="1" style:num-suffix="." style:num-list-format-name="" text:start-value="6">
        <style:list-level-properties text:space-before="2in" text:min-label-width="0.5625in"/>
        <style:text-properties fo:font-family="Aptos Display" fo:font-size="100%"/>
      </text:list-level-style-number>
      <text:list-level-style-number text:level="6" style:num-format="1" style:num-suffix="." style:num-list-format-name="" text:start-value="6">
        <style:list-level-properties text:space-before="2.5in" text:min-label-width="0.5625in"/>
        <style:text-properties fo:font-family="Aptos Display" fo:font-size="100%"/>
      </text:list-level-style-number>
      <text:list-level-style-number text:level="7" style:num-format="1" style:num-suffix="." style:num-list-format-name="" text:start-value="6">
        <style:list-level-properties text:space-before="3in" text:min-label-width="0.5625in"/>
        <style:text-properties fo:font-family="Aptos Display" fo:font-size="100%"/>
      </text:list-level-style-number>
      <text:list-level-style-number text:level="8" style:num-format="1" style:num-suffix="." style:num-list-format-name="" text:start-value="6">
        <style:list-level-properties text:space-before="3.5in" text:min-label-width="0.5625in"/>
        <style:text-properties fo:font-family="Aptos Display" fo:font-size="100%"/>
      </text:list-level-style-number>
      <text:list-level-style-number text:level="9" style:num-format="1" style:num-suffix="." style:num-list-format-name="" text:start-value="6">
        <style:list-level-properties text:space-before="4in" text:min-label-width="0.5625in"/>
        <style:text-properties fo:font-family="Aptos Display" fo:font-size="100%"/>
      </text:list-level-style-number>
    </text:list-style>
    <text:list-style style:name="a795">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3">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93">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64">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1">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4">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120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0">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776">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0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9">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text:list-style style:name="a1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9">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373">
      <text:list-level-style-number text:level="1" style:num-format="1" style:num-suffix="." style:num-list-format-name="" text:start-value="6">
        <style:list-level-properties text:space-before="0in" text:min-label-width="0.5625in"/>
        <style:text-properties fo:font-family="Aptos Display" fo:font-size="100%"/>
      </text:list-level-style-number>
      <text:list-level-style-number text:level="2" style:num-format="1" style:num-suffix="." style:num-list-format-name="" text:start-value="6">
        <style:list-level-properties text:space-before="0.5in" text:min-label-width="0.5625in"/>
        <style:text-properties fo:font-family="Aptos Display" fo:font-size="100%"/>
      </text:list-level-style-number>
      <text:list-level-style-number text:level="3" style:num-format="1" style:num-suffix="." style:num-list-format-name="" text:start-value="6">
        <style:list-level-properties text:space-before="1in" text:min-label-width="0.5625in"/>
        <style:text-properties fo:font-family="Aptos Display" fo:font-size="100%"/>
      </text:list-level-style-number>
      <text:list-level-style-number text:level="4" style:num-format="1" style:num-suffix="." style:num-list-format-name="" text:start-value="6">
        <style:list-level-properties text:space-before="1.5in" text:min-label-width="0.5625in"/>
        <style:text-properties fo:font-family="Aptos Display" fo:font-size="100%"/>
      </text:list-level-style-number>
      <text:list-level-style-number text:level="5" style:num-format="1" style:num-suffix="." style:num-list-format-name="" text:start-value="6">
        <style:list-level-properties text:space-before="2in" text:min-label-width="0.5625in"/>
        <style:text-properties fo:font-family="Aptos Display" fo:font-size="100%"/>
      </text:list-level-style-number>
      <text:list-level-style-number text:level="6" style:num-format="1" style:num-suffix="." style:num-list-format-name="" text:start-value="6">
        <style:list-level-properties text:space-before="2.5in" text:min-label-width="0.5625in"/>
        <style:text-properties fo:font-family="Aptos Display" fo:font-size="100%"/>
      </text:list-level-style-number>
      <text:list-level-style-number text:level="7" style:num-format="1" style:num-suffix="." style:num-list-format-name="" text:start-value="6">
        <style:list-level-properties text:space-before="3in" text:min-label-width="0.5625in"/>
        <style:text-properties fo:font-family="Aptos Display" fo:font-size="100%"/>
      </text:list-level-style-number>
      <text:list-level-style-number text:level="8" style:num-format="1" style:num-suffix="." style:num-list-format-name="" text:start-value="6">
        <style:list-level-properties text:space-before="3.5in" text:min-label-width="0.5625in"/>
        <style:text-properties fo:font-family="Aptos Display" fo:font-size="100%"/>
      </text:list-level-style-number>
      <text:list-level-style-number text:level="9" style:num-format="1" style:num-suffix="." style:num-list-format-name="" text:start-value="6">
        <style:list-level-properties text:space-before="4in" text:min-label-width="0.5625in"/>
        <style:text-properties fo:font-family="Aptos Display" fo:font-size="100%"/>
      </text:list-level-style-number>
    </text:list-style>
    <text:list-style style:name="a782">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2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376">
      <text:list-level-style-number text:level="1" style:num-format="1" style:num-suffix="." style:num-list-format-name="" text:start-value="6">
        <style:list-level-properties text:space-before="0in" text:min-label-width="0.5625in"/>
        <style:text-properties fo:font-family="Aptos Display" fo:font-size="100%"/>
      </text:list-level-style-number>
      <text:list-level-style-number text:level="2" style:num-format="1" style:num-suffix="." style:num-list-format-name="" text:start-value="6">
        <style:list-level-properties text:space-before="0.5in" text:min-label-width="0.5625in"/>
        <style:text-properties fo:font-family="Aptos Display" fo:font-size="100%"/>
      </text:list-level-style-number>
      <text:list-level-style-number text:level="3" style:num-format="1" style:num-suffix="." style:num-list-format-name="" text:start-value="6">
        <style:list-level-properties text:space-before="1in" text:min-label-width="0.5625in"/>
        <style:text-properties fo:font-family="Aptos Display" fo:font-size="100%"/>
      </text:list-level-style-number>
      <text:list-level-style-number text:level="4" style:num-format="1" style:num-suffix="." style:num-list-format-name="" text:start-value="6">
        <style:list-level-properties text:space-before="1.5in" text:min-label-width="0.5625in"/>
        <style:text-properties fo:font-family="Aptos Display" fo:font-size="100%"/>
      </text:list-level-style-number>
      <text:list-level-style-number text:level="5" style:num-format="1" style:num-suffix="." style:num-list-format-name="" text:start-value="6">
        <style:list-level-properties text:space-before="2in" text:min-label-width="0.5625in"/>
        <style:text-properties fo:font-family="Aptos Display" fo:font-size="100%"/>
      </text:list-level-style-number>
      <text:list-level-style-number text:level="6" style:num-format="1" style:num-suffix="." style:num-list-format-name="" text:start-value="6">
        <style:list-level-properties text:space-before="2.5in" text:min-label-width="0.5625in"/>
        <style:text-properties fo:font-family="Aptos Display" fo:font-size="100%"/>
      </text:list-level-style-number>
      <text:list-level-style-number text:level="7" style:num-format="1" style:num-suffix="." style:num-list-format-name="" text:start-value="6">
        <style:list-level-properties text:space-before="3in" text:min-label-width="0.5625in"/>
        <style:text-properties fo:font-family="Aptos Display" fo:font-size="100%"/>
      </text:list-level-style-number>
      <text:list-level-style-number text:level="8" style:num-format="1" style:num-suffix="." style:num-list-format-name="" text:start-value="6">
        <style:list-level-properties text:space-before="3.5in" text:min-label-width="0.5625in"/>
        <style:text-properties fo:font-family="Aptos Display" fo:font-size="100%"/>
      </text:list-level-style-number>
      <text:list-level-style-number text:level="9" style:num-format="1" style:num-suffix="." style:num-list-format-name="" text:start-value="6">
        <style:list-level-properties text:space-before="4in" text:min-label-width="0.5625in"/>
        <style:text-properties fo:font-family="Aptos Display" fo:font-size="100%"/>
      </text:list-level-style-number>
    </text:list-style>
    <text:list-style style:name="a787">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0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0">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1346">
      <text:list-level-style-number text:level="1" style:num-format="1" style:num-suffix="." style:num-list-format-name="">
        <style:list-level-properties text:space-before="0in" text:min-label-width="0.5625in"/>
        <style:text-properties fo:font-family="Aptos Display" fo:font-size="100%"/>
      </text:list-level-style-number>
      <text:list-level-style-number text:level="2" style:num-format="1" style:num-suffix="." style:num-list-format-name="">
        <style:list-level-properties text:space-before="0.5in" text:min-label-width="0.5625in"/>
        <style:text-properties fo:font-family="Aptos Display" fo:font-size="100%"/>
      </text:list-level-style-number>
      <text:list-level-style-number text:level="3" style:num-format="1" style:num-suffix="." style:num-list-format-name="">
        <style:list-level-properties text:space-before="1in" text:min-label-width="0.5625in"/>
        <style:text-properties fo:font-family="Aptos Display" fo:font-size="100%"/>
      </text:list-level-style-number>
      <text:list-level-style-number text:level="4" style:num-format="1" style:num-suffix="." style:num-list-format-name="">
        <style:list-level-properties text:space-before="1.5in" text:min-label-width="0.5625in"/>
        <style:text-properties fo:font-family="Aptos Display" fo:font-size="100%"/>
      </text:list-level-style-number>
      <text:list-level-style-number text:level="5" style:num-format="1" style:num-suffix="." style:num-list-format-name="">
        <style:list-level-properties text:space-before="2in" text:min-label-width="0.5625in"/>
        <style:text-properties fo:font-family="Aptos Display" fo:font-size="100%"/>
      </text:list-level-style-number>
      <text:list-level-style-number text:level="6" style:num-format="1" style:num-suffix="." style:num-list-format-name="">
        <style:list-level-properties text:space-before="2.5in" text:min-label-width="0.5625in"/>
        <style:text-properties fo:font-family="Aptos Display" fo:font-size="100%"/>
      </text:list-level-style-number>
      <text:list-level-style-number text:level="7" style:num-format="1" style:num-suffix="." style:num-list-format-name="">
        <style:list-level-properties text:space-before="3in" text:min-label-width="0.5625in"/>
        <style:text-properties fo:font-family="Aptos Display" fo:font-size="100%"/>
      </text:list-level-style-number>
      <text:list-level-style-number text:level="8" style:num-format="1" style:num-suffix="." style:num-list-format-name="">
        <style:list-level-properties text:space-before="3.5in" text:min-label-width="0.5625in"/>
        <style:text-properties fo:font-family="Aptos Display" fo:font-size="100%"/>
      </text:list-level-style-number>
      <text:list-level-style-number text:level="9" style:num-format="1" style:num-suffix="." style:num-list-format-name="">
        <style:list-level-properties text:space-before="4in" text:min-label-width="0.5625in"/>
        <style:text-properties fo:font-family="Aptos Display" fo:font-size="100%"/>
      </text:list-level-style-number>
    </text:list-style>
  </office:automatic-styles>
  <office:body>
    <office:presentation>
      <draw:page draw:name="Slide2" draw:style-name="a728" draw:master-page-name="Master1-Layout1-title-Title-Slide" presentation:presentation-page-layout-name="Master1-PPL1" draw:id="Slide-257">
        <draw:frame draw:id="id69" presentation:style-name="a731" draw:name="Title 1" svg:x="5.7937in" svg:y="0.7in" svg:width="6.8363in" svg:height="3.9in" presentation:class="title" presentation:placeholder="false">
          <draw:text-box>
            <text:p text:style-name="a730" text:class-names="" text:cond-style-name=""><text:span text:style-name="a729" text:class-names="">Security Principle 1: Authentication</text:span></text:p>
          </draw:text-box>
          <svg:title/>
          <svg:desc/>
        </draw:frame>
        <draw:frame draw:id="id70" presentation:style-name="a735" draw:name="Subtitle 2" svg:x="5.7937in" svg:y="5.07in" svg:width="6.8363in" svg:height="1.72in" presentation:class="subtitle" presentation:placeholder="false">
          <draw:text-box>
            <text:p text:style-name="a734" text:class-names="" text:cond-style-name=""><text:span text:style-name="a732" text:class-names="">Verifying identity in the digital world</text:span><text:span text:style-name="a733" text:class-names=""/></text:p>
          </draw:text-box>
          <svg:title/>
          <svg:desc/>
        </draw:frame>
        <draw:frame draw:id="id71" draw:style-name="a736" draw:name="Picture 7" svg:x="0in" svg:y="0.00001in" svg:width="5.09333in" svg:height="7.49999in" style:rel-width="scale" style:rel-height="scale">
          <draw:image xlink:href="media/image1.png" xlink:type="simple" xlink:show="embed" xlink:actuate="onLoad"/>
          <svg:title/>
          <svg:desc>A tablet with a key and a lock

AI-generated content may be incorrect.</svg:desc>
        </draw:frame>
      </draw:page>
      <draw:page draw:name="Slide3" draw:style-name="a737" draw:master-page-name="Master1-Layout2-obj-Title-and-Content" presentation:presentation-page-layout-name="Master1-PPL2" draw:id="Slide-258">
        <draw:frame draw:id="id72" presentation:style-name="a741" draw:name="Title 1" svg:x="0.91667in" svg:y="0.39931in" svg:width="11.5in" svg:height="1.44965in" presentation:class="title" presentation:placeholder="false">
          <draw:text-box>
            <text:p text:style-name="a740" text:class-names="" text:cond-style-name=""><text:span text:style-name="a738" text:class-names="">What is Authentication?</text:span><text:span text:style-name="a739" text:class-names=""/></text:p>
          </draw:text-box>
          <svg:title/>
          <svg:desc/>
        </draw:frame>
        <draw:frame draw:id="id73" presentation:style-name="a751" draw:name="Content Placeholder 2" svg:x="0.91667in" svg:y="1.99653in" svg:width="11.5in" svg:height="4.75868in" presentation:class="outline" presentation:placeholder="false">
          <draw:text-box>
            <text:list text:style-name="a745">
              <text:list-item>
                <text:p text:style-name="a744" text:class-names="" text:cond-style-name=""><text:span text:style-name="a742" text:class-names="">Authentication</text:span><text:span text:style-name="a743" text:class-names="">: verifying the identity of a user, process, or device, to allow access to resources in a system</text:span></text:p>
              </text:list-item>
            </text:list>
            <text:list text:style-name="a750">
              <text:list-item>
                <text:p text:style-name="a749" text:class-names="" text:cond-style-name=""><text:span text:style-name="a746" text:class-names="">It basically proving<text:s text:c="1"/></text:span><text:span text:style-name="a747" text:class-names="">who<text:s text:c="1"/></text:span><text:span text:style-name="a748" text:class-names="">you say you are, technology equivalent of showing your ID when voting in elections.</text:span></text:p>
              </text:list-item>
            </text:list>
          </draw:text-box>
          <svg:title/>
          <svg:desc/>
        </draw:frame>
      </draw:page>
      <draw:page draw:name="Slide4" draw:style-name="a752" draw:master-page-name="Master1-Layout2-obj-Title-and-Content" presentation:presentation-page-layout-name="Master1-PPL2" draw:id="Slide-259">
        <draw:frame draw:id="id74" presentation:style-name="a756" draw:name="Title 1" svg:x="0.91667in" svg:y="0.39931in" svg:width="11.5in" svg:height="1.44965in" presentation:class="title" presentation:placeholder="false">
          <draw:text-box>
            <text:p text:style-name="a755" text:class-names="" text:cond-style-name=""><text:span text:style-name="a753" text:class-names="">Why does Authentication matter?</text:span><text:span text:style-name="a754" text:class-names=""/></text:p>
          </draw:text-box>
          <svg:title/>
          <svg:desc/>
        </draw:frame>
        <draw:frame draw:id="id75" presentation:style-name="a796" draw:name="Content Placeholder 2" svg:x="0.61612in" svg:y="1.84754in" svg:width="12.08743in" svg:height="5.21053in" presentation:class="outline" presentation:placeholder="false">
          <draw:text-box>
            <text:list text:style-name="a761">
              <text:list-item>
                <text:p text:style-name="a760" text:class-names="" text:cond-style-name=""><text:span text:style-name="a757" text:class-names="">Authentication matters because it ensures that </text:span><text:span text:style-name="a758" text:class-names="">only authorised<text:s text:c="1"/></text:span><text:span text:style-name="a759" text:class-names="">users can access the organisation’s information.</text:span></text:p>
              </text:list-item>
            </text:list>
            <text:list text:style-name="a770">
              <text:list-item>
                <text:p text:style-name="a769" text:class-names="" text:cond-style-name=""><text:span text:style-name="a762" text:class-names="">Authentication helps<text:s text:c="1"/></text:span><text:span text:style-name="a763" text:class-names="">protect against </text:span><text:span text:style-name="a764" text:class-names="">unauthorised access and harm<text:s text:c="1"/></text:span><text:span text:style-name="a765" text:class-names="">to</text:span><text:span text:style-name="a766" text:class-names=""><text:s text:c="1"/></text:span><text:span text:style-name="a767" text:class-names="">sensitive data, such as modification or fraud.</text:span><text:span text:style-name="a768" text:class-names=""/></text:p>
              </text:list-item>
            </text:list>
            <text:list text:style-name="a776">
              <text:list-item>
                <text:list text:style-name="a776">
                  <text:list-item>
                    <text:p text:style-name="a775" text:class-names="" text:cond-style-name=""><text:span text:style-name="a771" text:class-names="">Password breaches are the root cause for<text:s text:c="1"/></text:span><text:span text:style-name="a772" text:class-names="">80% of breaches</text:span><text:span text:style-name="a773" text:class-names=""><text:s text:c="1"/>(National Cyber Security Centre, 2022).</text:span><text:span text:style-name="a774" text:class-names=""/></text:p>
                  </text:list-item>
                </text:list>
              </text:list-item>
            </text:list>
            <text:list text:style-name="a782">
              <text:list-item>
                <text:list text:style-name="a782">
                  <text:list-item>
                    <text:p text:style-name="a781" text:class-names="" text:cond-style-name=""><text:span text:style-name="a777" text:class-names="">Data in 2019 showed that<text:s text:c="1"/></text:span><text:span text:style-name="a778" text:class-names="">23.2 million victim accounts</text:span><text:span text:style-name="a779" text:class-names=""><text:s text:c="1"/>worldwide used 12345 as a password (National Cyber Security Centre, 2019).</text:span><text:span text:style-name="a780" text:class-names=""/></text:p>
                  </text:list-item>
                </text:list>
              </text:list-item>
            </text:list>
            <text:list text:style-name="a787">
              <text:list-item>
                <text:list text:style-name="a787">
                  <text:list-item>
                    <text:p text:style-name="a786" text:class-names="" text:cond-style-name=""><text:span text:style-name="a783" text:class-names="">Security attacks are<text:s text:c="1"/></text:span><text:span text:style-name="a784" text:class-names="">continuing to evolve</text:span><text:span text:style-name="a785" text:class-names="">, and yet online users are not doing enough to protect data and systems.</text:span></text:p>
                  </text:list-item>
                </text:list>
              </text:list-item>
            </text:list>
            <text:list text:style-name="a792">
              <text:list-item>
                <text:p text:style-name="a791" text:class-names="" text:cond-style-name=""><text:span text:style-name="a788" text:class-names="">Let's see what happens when authentication fails in Ubuntu and AWS, and<text:s text:c="1"/></text:span><text:span text:style-name="a789" text:class-names="">how to fix it</text:span><text:span text:style-name="a790" text:class-names="">.</text:span></text:p>
              </text:list-item>
            </text:list>
            <text:list text:style-name="a795">
              <text:list-item>
                <text:list text:style-name="a795">
                  <text:list-item>
                    <text:p text:style-name="a794" text:class-names="" text:cond-style-name=""><text:span text:style-name="a793" text:class-names=""/></text:p>
                  </text:list-item>
                </text:list>
              </text:list-item>
            </text:list>
          </draw:text-box>
          <svg:title/>
          <svg:desc/>
        </draw:frame>
        <presentation:notes draw:style-name="a802">
          <draw:page-thumbnail draw:page-number="3" svg:x="0.75in" svg:y="1.25in" svg:width="6in" svg:height="3.375in" presentation:class="page" draw:id="id76" presentation:style-name="a797" draw:name="Slide Image Placeholder 1">
            <svg:title/>
            <svg:desc/>
          </draw:page-thumbnail>
          <draw:frame draw:id="id77" presentation:style-name="a798" draw:name="Notes Placeholder 2" svg:x="0.75in" svg:y="4.8125in" svg:width="6in" svg:height="3.9375in" presentation:class="notes" presentation:placeholder="true">
            <draw:text-box/>
            <svg:title/>
            <svg:desc/>
          </draw:frame>
          <draw:frame draw:id="id78" draw:style-name="a801" draw:name="Slide Number Placeholder 3" svg:x="4.24826in" svg:y="9.49826in" svg:width="3.25in" svg:height="0.50174in">
            <draw:text-box>
              <text:p text:style-name="a800" text:class-names="" text:cond-style-name=""><text:span text:style-name="a799" text:class-names=""><text:page-number style:num-format="1" text:fixed="false"/></text:span></text:p>
            </draw:text-box>
            <svg:title/>
            <svg:desc/>
          </draw:frame>
        </presentation:notes>
      </draw:page>
      <draw:page draw:name="Slide5" draw:style-name="a803" draw:master-page-name="Master1-Layout2-obj-Title-and-Content" presentation:presentation-page-layout-name="Master1-PPL2" draw:id="Slide-260">
        <draw:frame draw:id="id79" presentation:style-name="a807" draw:name="Title 1" svg:x="6.66667in" svg:y="0in" svg:width="6.66667in" svg:height="1.46123in" presentation:class="title" presentation:placeholder="false">
          <draw:text-box>
            <text:p text:style-name="a806" text:class-names="" text:cond-style-name=""><text:span text:style-name="a804" text:class-names="">Initial Linux Vulnerable Setup</text:span><text:span text:style-name="a805" text:class-names=""/></text:p>
          </draw:text-box>
          <svg:title/>
          <svg:desc/>
        </draw:frame>
        <draw:frame draw:id="id80" presentation:style-name="a808" draw:name="Picture 18" svg:x="0in" svg:y="0.92172in" svg:width="6.66667in" svg:height="5.65656in" style:rel-width="scale" style:rel-height="scale" presentation:class="graphic" presentation:placeholder="false">
          <draw:image xlink:href="media/image2.png" xlink:type="simple" xlink:show="embed" xlink:actuate="onLoad"/>
          <svg:title/>
          <svg:desc/>
        </draw:frame>
        <draw:frame draw:id="id81" draw:style-name="a813" draw:name="TextBox 4" svg:x="0in" svg:y="6.57828in" svg:width="6.66667in" svg:height="0.80781in">
          <draw:text-box>
            <text:p text:style-name="a810" text:class-names="" text:cond-style-name=""><text:span text:style-name="a809" text:class-names="">Figure 1: 20 employees of the organisation have no expiry date for their passwords</text:span></text:p>
            <text:p text:style-name="a812" text:class-names="" text:cond-style-name=""><text:span text:style-name="a811" text:class-names=""/></text:p>
          </draw:text-box>
          <svg:title/>
          <svg:desc/>
        </draw:frame>
        <draw:frame draw:id="id82" draw:style-name="a837" draw:name="Content Placeholder 2" svg:x="6.66667in" svg:y="1.46123in" svg:width="6.66667in" svg:height="6.03877in">
          <draw:text-box>
            <text:list text:style-name="a817">
              <text:list-item>
                <text:p text:style-name="a816" text:class-names="" text:cond-style-name=""><text:span text:style-name="a814" text:class-names="">No password requirements have been set<text:s text:c="1"/></text:span><text:span text:style-name="a815" text:class-names="">– allows employees to set their passwords without restriction</text:span></text:p>
              </text:list-item>
            </text:list>
            <text:list text:style-name="a820">
              <text:list-item>
                <text:list text:style-name="a820">
                  <text:list-item>
                    <text:p text:style-name="a819" text:class-names="" text:cond-style-name=""><text:span text:style-name="a818" text:class-names="">User can set a password as easy as 123 or dictionary words</text:span></text:p>
                  </text:list-item>
                </text:list>
              </text:list-item>
            </text:list>
            <text:list text:style-name="a824">
              <text:list-item>
                <text:p text:style-name="a823" text:class-names="" text:cond-style-name=""><text:span text:style-name="a821" text:class-names="">No password expiry date policy<text:s text:c="1"/></text:span><text:span text:style-name="a822" text:class-names="">– employees’ passwords remain the same indefinitely</text:span></text:p>
              </text:list-item>
            </text:list>
            <text:list text:style-name="a827">
              <text:list-item>
                <text:list text:style-name="a827">
                  <text:list-item>
                    <text:p text:style-name="a826" text:class-names="" text:cond-style-name=""><text:span text:style-name="a825" text:class-names="">“sudo chage -M -1 username”</text:span></text:p>
                  </text:list-item>
                </text:list>
              </text:list-item>
            </text:list>
            <text:list text:style-name="a831">
              <text:list-item>
                <text:list text:style-name="a831">
                  <text:list-item>
                    <text:p text:style-name="a830" text:class-names="" text:cond-style-name=""><text:span text:style-name="a828" text:class-names="">“sudo chage”<text:s text:c="1"/></text:span><text:span text:style-name="a829" text:class-names="">– Linux command to change password expiry</text:span></text:p>
                  </text:list-item>
                </text:list>
              </text:list-item>
            </text:list>
            <text:list text:style-name="a836">
              <text:list-item>
                <text:list text:style-name="a836">
                  <text:list-item>
                    <text:p text:style-name="a835" text:class-names="" text:cond-style-name=""><text:span text:style-name="a832" text:class-names="">“-1”<text:s text:c="1"/></text:span><text:span text:style-name="a833" text:class-names="">– password expiry removed</text:span><text:span text:style-name="a834" text:class-names=""/></text:p>
                  </text:list-item>
                </text:list>
              </text:list-item>
            </text:list>
          </draw:text-box>
          <svg:title/>
          <svg:desc/>
        </draw:frame>
      </draw:page>
      <draw:page draw:name="Slide6" draw:style-name="a838" draw:master-page-name="Master1-Layout2-obj-Title-and-Content" presentation:presentation-page-layout-name="Master1-PPL2" draw:id="Slide-261">
        <draw:frame draw:id="id83" draw:style-name="a845" draw:name="TextBox 4" svg:x="1.53952in" svg:y="5.06387in" svg:width="10.24063in" svg:height="0.40391in">
          <draw:text-box>
            <text:p text:style-name="a844" text:class-names="" text:cond-style-name=""><text:span text:style-name="a839" text:class-names="">Figure 2: <text:s text:c="1"/>Part of the contents of the<text:s text:c="1"/></text:span><text:span text:style-name="a840" text:class-names="">passwds.txt</text:span><text:span text:style-name="a841" text:class-names=""><text:s text:c="1"/>file being shown using the<text:s text:c="1"/></text:span><text:span text:style-name="a842" text:class-names="">cat</text:span><text:span text:style-name="a843" text:class-names=""><text:s text:c="1"/>command.</text:span></text:p>
          </draw:text-box>
          <svg:title/>
          <svg:desc/>
        </draw:frame>
        <draw:frame draw:id="id84" draw:style-name="a846" draw:name="Picture 7" svg:x="2.08022in" svg:y="3.75841in" svg:width="9.18657in" svg:height="1.30546in" style:rel-width="scale" style:rel-height="scale">
          <draw:image xlink:href="media/image3.png" xlink:type="simple" xlink:show="embed" xlink:actuate="onLoad"/>
          <svg:title/>
          <svg:desc/>
        </draw:frame>
        <draw:frame draw:id="id85" draw:style-name="a847" draw:name="Picture 4" svg:x="2.06655in" svg:y="5.69405in" svg:width="9.18657in" svg:height="0.2027in" style:rel-width="scale" style:rel-height="scale">
          <draw:image xlink:href="media/image4.png" xlink:type="simple" xlink:show="embed" xlink:actuate="onLoad"/>
          <svg:title/>
          <svg:desc/>
        </draw:frame>
        <draw:frame draw:id="id86" draw:style-name="a848" draw:name="Picture 4" svg:x="2.08022in" svg:y="5.89675in" svg:width="9.18657in" svg:height="0.92179in" style:rel-width="scale" style:rel-height="scale">
          <draw:image xlink:href="media/image4.png" xlink:type="simple" xlink:show="embed" xlink:actuate="onLoad"/>
          <svg:title/>
          <svg:desc/>
        </draw:frame>
        <draw:frame draw:id="id87" draw:style-name="a855" draw:name="TextBox 10" svg:x="1.355in" svg:y="6.81854in" svg:width="10.60967in" svg:height="0.40391in">
          <draw:text-box>
            <text:p text:style-name="a854" text:class-names="" text:cond-style-name=""><text:span text:style-name="a849" text:class-names="">Figure 3: <text:s text:c="1"/>Part of the contents of the<text:s text:c="1"/></text:span><text:span text:style-name="a850" text:class-names="">shadows.txt</text:span><text:span text:style-name="a851" text:class-names=""><text:s text:c="1"/>file being shown using the<text:s text:c="1"/></text:span><text:span text:style-name="a852" text:class-names="">cat</text:span><text:span text:style-name="a853" text:class-names=""><text:s text:c="1"/>command.</text:span></text:p>
          </draw:text-box>
          <svg:title/>
          <svg:desc/>
        </draw:frame>
        <draw:frame draw:id="id88" presentation:style-name="a876" draw:name="Content Placeholder 2" svg:x="0.61612in" svg:y="1.18626in" svg:width="12.08743in" svg:height="2.45166in" presentation:class="outline" presentation:placeholder="false">
          <draw:text-box>
            <text:list text:style-name="a859">
              <text:list-item>
                <text:p text:style-name="a858" text:class-names="" text:cond-style-name=""><text:span text:style-name="a856" text:class-names="">The hacker uses two files within Linux to obtain passwords:</text:span><text:span text:style-name="a857" text:class-names=""/></text:p>
              </text:list-item>
            </text:list>
            <text:list text:style-name="a863">
              <text:list-item>
                <text:list text:style-name="a863">
                  <text:list-item>
                    <text:p text:style-name="a862" text:class-names="" text:cond-style-name=""><text:span text:style-name="a860" text:class-names="">passwds.txt</text:span><text:span text:style-name="a861" text:class-names=""><text:s text:c="1"/>– text file database that stores user information</text:span></text:p>
                  </text:list-item>
                </text:list>
              </text:list-item>
            </text:list>
            <text:list text:style-name="a868">
              <text:list-item>
                <text:list text:style-name="a868">
                  <text:list-item>
                    <text:p text:style-name="a867" text:class-names="" text:cond-style-name=""><text:span text:style-name="a864" text:class-names="">shadows.txt</text:span><text:span text:style-name="a865" text:class-names=""><text:s text:c="1"/>– text file database that stores hashed passwords (The Anshuman, 2023)</text:span><text:span text:style-name="a866" text:class-names=""/></text:p>
                  </text:list-item>
                </text:list>
              </text:list-item>
            </text:list>
            <text:list text:style-name="a871">
              <text:list-item>
                <text:p text:style-name="a870" text:class-names="" text:cond-style-name=""><text:span text:style-name="a869" text:class-names="">These two files are used because the username of an employee’s account is user information, while password hashes help obtain passwords.</text:span></text:p>
              </text:list-item>
            </text:list>
            <text:list text:style-name="a875">
              <text:list-item>
                <text:p text:style-name="a874" text:class-names="" text:cond-style-name=""><text:span text:style-name="a872" text:class-names="">Password hashes</text:span><text:span text:style-name="a873" text:class-names=""><text:s text:c="1"/>– store passwords without revealing their contents. It is used to compare to a password being verified</text:span></text:p>
              </text:list-item>
            </text:list>
          </draw:text-box>
          <svg:title/>
          <svg:desc/>
        </draw:frame>
        <draw:frame draw:id="id89" presentation:style-name="a880" draw:name="Title 1" svg:x="0.90983in" svg:y="0in" svg:width="11.5in" svg:height="1.44965in" presentation:class="title" presentation:placeholder="false">
          <draw:text-box>
            <text:p text:style-name="a879" text:class-names="" text:cond-style-name=""><text:span text:style-name="a877" text:class-names="">Linux Exploitation Process</text:span><text:span text:style-name="a878" text:class-names=""/></text:p>
          </draw:text-box>
          <svg:title/>
          <svg:desc/>
        </draw:frame>
        <presentation:notes draw:style-name="a894">
          <draw:page-thumbnail draw:page-number="5" svg:x="0.75in" svg:y="1.25in" svg:width="6in" svg:height="3.375in" presentation:class="page" draw:id="id90" presentation:style-name="a881" draw:name="Slide Image Placeholder 1">
            <svg:title/>
            <svg:desc/>
          </draw:page-thumbnail>
          <draw:frame draw:id="id91" presentation:style-name="a890" draw:name="Notes Placeholder 2" svg:x="0.75in" svg:y="4.8125in" svg:width="6in" svg:height="3.9375in" presentation:class="notes" presentation:placeholder="false">
            <draw:text-box>
              <text:p text:style-name="a885" text:class-names="" text:cond-style-name=""><text:span text:style-name="a882" text:class-names="">The_Anshuman (2023).<text:s text:c="1"/></text:span><text:span text:style-name="a883" text:class-names="">Understanding /etc/passwd and /etc/shadow Files - The_Anshuman - Medium</text:span><text:span text:style-name="a884" text:class-names="">. [online] Medium. Available at: https://medium.com/@The_Anshuman/understanding-etc-passwd-and-etc-shadow-files-58630eb0eda8.</text:span></text:p>
              <text:p text:style-name="a887" text:class-names="" text:cond-style-name=""><text:span text:style-name="a886" text:class-names=""/></text:p>
              <text:p text:style-name="a889" text:class-names="" text:cond-style-name=""><text:span text:style-name="a888" text:class-names=""/></text:p>
            </draw:text-box>
            <svg:title/>
            <svg:desc/>
          </draw:frame>
          <draw:frame draw:id="id92" draw:style-name="a893" draw:name="Slide Number Placeholder 3" svg:x="4.24826in" svg:y="9.49826in" svg:width="3.25in" svg:height="0.50174in">
            <draw:text-box>
              <text:p text:style-name="a892" text:class-names="" text:cond-style-name=""><text:span text:style-name="a891" text:class-names=""><text:page-number style:num-format="1" text:fixed="false"/></text:span></text:p>
            </draw:text-box>
            <svg:title/>
            <svg:desc/>
          </draw:frame>
        </presentation:notes>
      </draw:page>
      <draw:page draw:name="Slide7" draw:style-name="a895" draw:master-page-name="Master1-Layout7-blank-Blank" presentation:presentation-page-layout-name="Master1-PPL7" draw:id="Slide-262">
        <draw:frame draw:id="id93" draw:style-name="a896" draw:name="Picture 6" svg:x="-0.00683in" svg:y="3.94805in" svg:width="8.47354in" svg:height="1.70255in" style:rel-width="scale" style:rel-height="scale">
          <draw:image xlink:href="media/image5.png" xlink:type="simple" xlink:show="embed" xlink:actuate="onLoad"/>
          <svg:title/>
          <svg:desc/>
        </draw:frame>
        <draw:frame draw:id="id94" draw:style-name="a897" draw:name="Picture 8" svg:x="0in" svg:y="5.67893in" svg:width="8.4667in" svg:height="1.74212in" style:rel-width="scale" style:rel-height="scale">
          <draw:image xlink:href="media/image6.png" xlink:type="simple" xlink:show="embed" xlink:actuate="onLoad"/>
          <svg:title/>
          <svg:desc/>
        </draw:frame>
        <draw:frame draw:id="id95" draw:style-name="a904" draw:name="TextBox 3" svg:x="8.4667in" svg:y="4.43305in" svg:width="4.86663in" svg:height="0.90879in">
          <draw:text-box>
            <text:p text:style-name="a903" text:class-names="" text:cond-style-name=""><text:span text:style-name="a898" text:class-names="">Figure 4: <text:s text:c="1"/>Part of the contents of the newly created<text:s text:c="1"/></text:span><text:span text:style-name="a899" text:class-names="">unshadow.txt</text:span><text:span text:style-name="a900" text:class-names=""><text:s text:c="1"/>file being shown using the<text:s text:c="1"/></text:span><text:span text:style-name="a901" text:class-names="">cat</text:span><text:span text:style-name="a902" text:class-names=""><text:s text:c="1"/>command.</text:span></text:p>
          </draw:text-box>
          <svg:title/>
          <svg:desc/>
        </draw:frame>
        <draw:frame draw:id="id96" draw:style-name="a907" draw:name="TextBox 4" svg:x="8.4667in" svg:y="6.26388in" svg:width="4.86663in" svg:height="0.63952in">
          <draw:text-box>
            <text:p text:style-name="a906" text:class-names="" text:cond-style-name=""><text:span text:style-name="a905" text:class-names="">Figure 5: <text:s text:c="1"/>Successful dictionary-based attack using “John The Ripper”</text:span></text:p>
          </draw:text-box>
          <svg:title/>
          <svg:desc/>
        </draw:frame>
        <draw:frame draw:id="id97" draw:style-name="a942" draw:name="Content Placeholder 2" svg:x="0.61612in" svg:y="0.96465in" svg:width="12.08743in" svg:height="3.0306in">
          <draw:text-box>
            <text:list text:style-name="a914">
              <text:list-item>
                <text:p text:style-name="a913" text:class-names="" text:cond-style-name=""><text:span text:style-name="a908" text:class-names="">To combine the employee’s data from both files, the hacker uses the<text:s text:c="1"/></text:span><text:span text:style-name="a909" text:class-names="">unshadow</text:span><text:span text:style-name="a910" text:class-names=""><text:s text:c="1"/>command and creates a new file named<text:s text:c="1"/></text:span><text:span text:style-name="a911" text:class-names="">unshadow.txt</text:span><text:span text:style-name="a912" text:class-names="">.</text:span></text:p>
              </text:list-item>
            </text:list>
            <text:list text:style-name="a919">
              <text:list-item>
                <text:p text:style-name="a918" text:class-names="" text:cond-style-name=""><text:span text:style-name="a915" text:class-names="">The hacker creates a second file named<text:s text:c="1"/></text:span><text:span text:style-name="a916" text:class-names="">gin-passwords.txt</text:span><text:span text:style-name="a917" text:class-names="">. This file contains a list of common passwords used online.</text:span></text:p>
              </text:list-item>
            </text:list>
            <text:list text:style-name="a936">
              <text:list-item>
                <text:p text:style-name="a935" text:class-names="" text:cond-style-name=""><text:span text:style-name="a920" text:class-names="">“John the Ripper” software is used to compare<text:s text:c="1"/></text:span><text:span text:style-name="a921" text:class-names="">th</text:span><text:span text:style-name="a922" text:class-names="">e</text:span><text:span text:style-name="a923" text:class-names=""><text:s text:c="1"/></text:span><text:span text:style-name="a924" text:class-names="">list<text:s text:c="1"/></text:span><text:span text:style-name="a925" text:class-names="">of passwords in<text:s text:c="1"/></text:span><text:span text:style-name="a926" text:class-names="">gin-passwords.txt</text:span><text:span text:style-name="a927" text:class-names=""><text:s text:c="2"/>against<text:s text:c="1"/></text:span><text:span text:style-name="a928" text:class-names="">the<text:s text:c="1"/></text:span><text:span text:style-name="a929" text:class-names="">employee</text:span><text:span text:style-name="a930" text:class-names="">s’</text:span><text:span text:style-name="a931" text:class-names=""><text:s text:c="1"/></text:span><text:span text:style-name="a932" text:class-names="">data in<text:s text:c="1"/></text:span><text:span text:style-name="a933" text:class-names="">unshadow.txt</text:span><text:span text:style-name="a934" text:class-names="">.</text:span></text:p>
              </text:list-item>
            </text:list>
            <text:list text:style-name="a941">
              <text:list-item>
                <text:p text:style-name="a940" text:class-names="" text:cond-style-name=""><text:span text:style-name="a937" text:class-names="">If any passwords in<text:s text:c="1"/></text:span><text:span text:style-name="a938" text:class-names="">gin-passwords.txt</text:span><text:span text:style-name="a939" text:class-names=""><text:s text:c="1"/>match the password hashes, then “John the Ripper” will display the password alongside the user<text:s text:c="1"/></text:span></text:p>
              </text:list-item>
            </text:list>
          </draw:text-box>
          <svg:title/>
          <svg:desc/>
        </draw:frame>
        <draw:frame draw:id="id98" draw:style-name="a946" draw:name="Title 1" svg:x="0.90983in" svg:y="0in" svg:width="11.5in" svg:height="0.96465in">
          <draw:text-box>
            <text:p text:style-name="a945" text:class-names="" text:cond-style-name=""><text:span text:style-name="a943" text:class-names="">Linux Exploitation Process</text:span><text:span text:style-name="a944" text:class-names=""/></text:p>
          </draw:text-box>
          <svg:title/>
          <svg:desc/>
        </draw:frame>
      </draw:page>
      <draw:page draw:name="Slide8" draw:style-name="a947" draw:master-page-name="Master1-Layout2-obj-Title-and-Content" presentation:presentation-page-layout-name="Master1-PPL2" draw:id="Slide-263">
        <draw:frame draw:id="id99" presentation:style-name="a951" draw:name="Title 1" svg:x="0.91667in" svg:y="0.39931in" svg:width="11.5in" svg:height="1.44965in" presentation:class="title" presentation:placeholder="false">
          <draw:text-box>
            <text:p text:style-name="a950" text:class-names="" text:cond-style-name=""><text:span text:style-name="a948" text:class-names="">Why did the exploitation work?</text:span><text:span text:style-name="a949" text:class-names=""/></text:p>
          </draw:text-box>
          <svg:title/>
          <svg:desc/>
        </draw:frame>
        <draw:frame draw:id="id100" presentation:style-name="a973" draw:name="Content Placeholder 2" svg:x="0.61612in" svg:y="1.84754in" svg:width="12.08743in" svg:height="5.21053in" presentation:class="outline" presentation:placeholder="false">
          <draw:text-box>
            <text:list text:style-name="a954">
              <text:list-item>
                <text:p text:style-name="a953" text:class-names="" text:cond-style-name=""><text:span text:style-name="a952" text:class-names="">The exploitation worked because the passwords of the two users were either dictionary-based words or commonly used passwords.</text:span></text:p>
              </text:list-item>
            </text:list>
            <text:list text:style-name="a957">
              <text:list-item>
                <text:list text:style-name="a957">
                  <text:list-item>
                    <text:p text:style-name="a956" text:class-names="" text:cond-style-name=""><text:span text:style-name="a955" text:class-names="">Thomas Harris – qwerty123 – common password because all characters are close to each in the keyboard</text:span></text:p>
                  </text:list-item>
                </text:list>
              </text:list-item>
            </text:list>
            <text:list text:style-name="a960">
              <text:list-item>
                <text:list text:style-name="a960">
                  <text:list-item>
                    <text:p text:style-name="a959" text:class-names="" text:cond-style-name=""><text:span text:style-name="a958" text:class-names="">Sophie Martin – Arsenal – dictionary word mostly affiliated with the football club bearing the name</text:span></text:p>
                  </text:list-item>
                </text:list>
              </text:list-item>
            </text:list>
            <text:list text:style-name="a966">
              <text:list-item>
                <text:p text:style-name="a965" text:class-names="" text:cond-style-name=""><text:span text:style-name="a961" text:class-names="">Passwords with dictionary words or common combinations have low-time complexity. Because of this, “John the Ripper” had<text:s text:c="1"/></text:span><text:span text:style-name="a962" text:class-names="">common<text:s text:c="1"/></text:span><text:span text:style-name="a963" text:class-names="">combinations<text:s text:c="1"/></text:span><text:span text:style-name="a964" text:class-names="">to try (characters close to each other on a keyboard) and was able to rely on simple words from the dictionary to obtain the passwords.</text:span></text:p>
              </text:list-item>
            </text:list>
            <text:list text:style-name="a969">
              <text:list-item>
                <text:p text:style-name="a968" text:class-names="" text:cond-style-name=""><text:span text:style-name="a967" text:class-names="">These easy passwords were implemented because there were no password policies put in place – a failure on the part of the organisation’s weak security procedures.</text:span></text:p>
              </text:list-item>
            </text:list>
            <text:list text:style-name="a972">
              <text:list-item>
                <text:p text:style-name="a971" text:class-names="" text:cond-style-name=""><text:span text:style-name="a970" text:class-names="">Compromised accounts can lead to unauthorised access of the organisation’s sources, allowing attackers to obtain or modify sensitive data.</text:span></text:p>
              </text:list-item>
            </text:list>
          </draw:text-box>
          <svg:title/>
          <svg:desc/>
        </draw:frame>
        <presentation:notes draw:style-name="a979">
          <draw:page-thumbnail draw:page-number="7" svg:x="0.75in" svg:y="1.25in" svg:width="6in" svg:height="3.375in" presentation:class="page" draw:id="id101" presentation:style-name="a974" draw:name="Slide Image Placeholder 1">
            <svg:title/>
            <svg:desc/>
          </draw:page-thumbnail>
          <draw:frame draw:id="id102" presentation:style-name="a975" draw:name="Notes Placeholder 2" svg:x="0.75in" svg:y="4.8125in" svg:width="6in" svg:height="3.9375in" presentation:class="notes" presentation:placeholder="true">
            <draw:text-box/>
            <svg:title/>
            <svg:desc/>
          </draw:frame>
          <draw:frame draw:id="id103" draw:style-name="a978" draw:name="Slide Number Placeholder 3" svg:x="4.24826in" svg:y="9.49826in" svg:width="3.25in" svg:height="0.50174in">
            <draw:text-box>
              <text:p text:style-name="a977" text:class-names="" text:cond-style-name=""><text:span text:style-name="a976" text:class-names=""><text:page-number style:num-format="1" text:fixed="false"/></text:span></text:p>
            </draw:text-box>
            <svg:title/>
            <svg:desc/>
          </draw:frame>
        </presentation:notes>
      </draw:page>
      <draw:page draw:name="Slide9" draw:style-name="a980" draw:master-page-name="Master1-Layout2-obj-Title-and-Content" presentation:presentation-page-layout-name="Master1-PPL2" draw:id="Slide-264">
        <draw:frame draw:id="id104" draw:style-name="a981" draw:name="Picture 4" svg:x="0in" svg:y="1.16199in" svg:width="6.66667in" svg:height="1.61408in" style:rel-width="scale" style:rel-height="scale">
          <draw:image xlink:href="media/image7.png" xlink:type="simple" xlink:show="embed" xlink:actuate="onLoad"/>
          <svg:title/>
          <svg:desc/>
        </draw:frame>
        <draw:frame draw:id="id105" draw:style-name="a982" draw:name="Picture 6" svg:x="0in" svg:y="5.19872in" svg:width="6.66666in" svg:height="0.69in" style:rel-width="scale" style:rel-height="scale">
          <draw:image xlink:href="media/image8.png" xlink:type="simple" xlink:show="embed" xlink:actuate="onLoad"/>
          <svg:title/>
          <svg:desc/>
        </draw:frame>
        <draw:frame draw:id="id106" draw:style-name="a986" draw:name="Title 1" svg:x="6.66667in" svg:y="0in" svg:width="6.66667in" svg:height="1.46123in">
          <draw:text-box>
            <text:p text:style-name="a985" text:class-names="" text:cond-style-name=""><text:span text:style-name="a983" text:class-names="">Solutions for preventing exploitation: Enforcing password policies</text:span><text:span text:style-name="a984" text:class-names=""/></text:p>
          </draw:text-box>
          <svg:title/>
          <svg:desc/>
        </draw:frame>
        <draw:frame draw:id="id107" draw:style-name="a1004" draw:name="Content Placeholder 2" svg:x="6.66667in" svg:y="1.46123in" svg:width="6.66667in" svg:height="6.03877in">
          <draw:text-box>
            <text:list text:style-name="a997">
              <text:list-item>
                <text:p text:style-name="a996" text:class-names="" text:cond-style-name=""><text:span text:style-name="a987" text:class-names="">Install<text:s text:c="1"/></text:span><text:span text:style-name="a988" text:class-names="">libpam-pwquality</text:span><text:span text:style-name="a989" text:class-names=""><text:s text:c="1"/>(Fig 6.) –<text:s text:c="1"/></text:span><text:span text:style-name="a990" text:class-names="">Pluggable Authentication<text:s text:c="1"/></text:span><text:span text:style-name="a991" text:class-names="">Module (</text:span><text:span text:style-name="a992" text:class-names="">PAM</text:span><text:span text:style-name="a993" text:class-names="">)</text:span><text:span text:style-name="a994" text:class-names=""><text:s text:c="1"/>that<text:s text:c="1"/></text:span><text:span text:style-name="a995" text:class-names="">performs password quality checking (Canonical, 2019).</text:span></text:p>
              </text:list-item>
            </text:list>
            <text:list text:style-name="a1003">
              <text:list-item>
                <text:p text:style-name="a1002" text:class-names="" text:cond-style-name=""><text:span text:style-name="a998" text:class-names="">Modify password policies in /etc/</text:span><text:span text:style-name="a999" text:class-names="">pam.d</text:span><text:span text:style-name="a1000" text:class-names="">/common-password<text:s text:c="1"/></text:span><text:span text:style-name="a1001" text:class-names="">(Fig 7.) – apply password policies into this new folder installed alongside the PAM module</text:span></text:p>
              </text:list-item>
            </text:list>
          </draw:text-box>
          <svg:title/>
          <svg:desc/>
        </draw:frame>
        <draw:frame draw:id="id108" draw:style-name="a1005" draw:name="Picture 4" svg:x="0in" svg:y="4.69091in" svg:width="6.66667in" svg:height="0.50781in" style:rel-width="scale" style:rel-height="scale">
          <draw:image xlink:href="media/image7.png" xlink:type="simple" xlink:show="embed" xlink:actuate="onLoad"/>
          <svg:title/>
          <svg:desc/>
        </draw:frame>
        <draw:frame draw:id="id109" draw:style-name="a1010" draw:name="TextBox 10" svg:x="0in" svg:y="2.7739in" svg:width="6.66667in" svg:height="0.5722in">
          <draw:text-box>
            <text:p text:style-name="a1007" text:class-names="" text:cond-style-name=""><text:span text:style-name="a1006" text:class-names="">Figure 6: Installation of linpam-pqwuality using “sudo apt install” command</text:span></text:p>
            <text:p text:style-name="a1009" text:class-names="" text:cond-style-name=""><text:span text:style-name="a1008" text:class-names=""/></text:p>
          </draw:text-box>
          <svg:title/>
          <svg:desc/>
        </draw:frame>
        <draw:frame draw:id="id110" draw:style-name="a1015" draw:name="TextBox 11" svg:x="0in" svg:y="5.90185in" svg:width="6.66667in" svg:height="1.04342in">
          <draw:text-box>
            <text:p text:style-name="a1012" text:class-names="" text:cond-style-name=""><text:span text:style-name="a1011" text:class-names="">Figure 6: Modification of /etc/pam.d/common-password using “sudo nano” command. “cat” command used to show new password policies implemented.</text:span></text:p>
            <text:p text:style-name="a1014" text:class-names="" text:cond-style-name=""><text:span text:style-name="a1013" text:class-names=""/></text:p>
          </draw:text-box>
          <svg:title/>
          <svg:desc/>
        </draw:frame>
        <presentation:notes draw:style-name="a1026">
          <draw:page-thumbnail draw:page-number="8" svg:x="0.75in" svg:y="1.25in" svg:width="6in" svg:height="3.375in" presentation:class="page" draw:id="id111" presentation:style-name="a1016" draw:name="Slide Image Placeholder 1">
            <svg:title/>
            <svg:desc/>
          </draw:page-thumbnail>
          <draw:frame draw:id="id112" presentation:style-name="a1022" draw:name="Notes Placeholder 2" svg:x="0.75in" svg:y="4.8125in" svg:width="6in" svg:height="3.9375in" presentation:class="notes" presentation:placeholder="false">
            <draw:text-box>
              <text:p text:style-name="a1021" text:class-names="" text:cond-style-name=""><text:span text:style-name="a1017" text:class-names="">Canonical (2019).<text:s text:c="1"/></text:span><text:span text:style-name="a1018" text:class-names="">Ubuntu Manpage: pam_pwquality - PAM module to perform password quality checking</text:span><text:span text:style-name="a1019" text:class-names="">. [online] Ubuntu.com. Available at: https://manpages.ubuntu.com/manpages/jammy/man8/pam_pwquality.8.html.</text:span><text:span text:style-name="a1020" text:class-names=""/></text:p>
            </draw:text-box>
            <svg:title/>
            <svg:desc/>
          </draw:frame>
          <draw:frame draw:id="id113" draw:style-name="a1025" draw:name="Slide Number Placeholder 3" svg:x="4.24826in" svg:y="9.49826in" svg:width="3.25in" svg:height="0.50174in">
            <draw:text-box>
              <text:p text:style-name="a1024" text:class-names="" text:cond-style-name=""><text:span text:style-name="a1023" text:class-names=""><text:page-number style:num-format="1" text:fixed="false"/></text:span></text:p>
            </draw:text-box>
            <svg:title/>
            <svg:desc/>
          </draw:frame>
        </presentation:notes>
      </draw:page>
      <draw:page draw:name="Slide10" draw:style-name="a1027" draw:master-page-name="Master1-Layout2-obj-Title-and-Content" presentation:presentation-page-layout-name="Master1-PPL2" draw:id="Slide-265">
        <draw:frame draw:id="id114" draw:style-name="a1028" draw:name="Picture 6" svg:x="1.40122in" svg:y="1.84896in" svg:width="10.51723in" svg:height="1.08854in" style:rel-width="scale" style:rel-height="scale">
          <draw:image xlink:href="media/image8.png" xlink:type="simple" xlink:show="embed" xlink:actuate="onLoad"/>
          <svg:title/>
          <svg:desc/>
        </draw:frame>
        <draw:frame draw:id="id115" presentation:style-name="a1032" draw:name="Title 1" svg:x="0.91667in" svg:y="0.39931in" svg:width="11.5in" svg:height="1.44965in" presentation:class="title" presentation:placeholder="false">
          <draw:text-box>
            <text:p text:style-name="a1031" text:class-names="" text:cond-style-name=""><text:span text:style-name="a1029" text:class-names="">Solutions for preventing exploitation: Enforcing password policies in /etc/pam.d/common-password<text:s text:c="1"/></text:span><text:span text:style-name="a1030" text:class-names=""/></text:p>
          </draw:text-box>
          <svg:title/>
          <svg:desc/>
        </draw:frame>
        <draw:frame draw:id="id116" presentation:style-name="a1063" draw:name="Content Placeholder 2" svg:x="0.61612in" svg:y="3.14854in" svg:width="12.08743in" svg:height="4.1848in" presentation:class="outline" presentation:placeholder="false">
          <draw:text-box>
            <text:list text:style-name="a1035">
              <text:list-item>
                <text:p text:style-name="a1034" text:class-names="" text:cond-style-name=""><text:span text:style-name="a1033" text:class-names="">retry=3 – number of login attempts allowed set to 3.</text:span></text:p>
              </text:list-item>
            </text:list>
            <text:list text:style-name="a1038">
              <text:list-item>
                <text:list text:style-name="a1038">
                  <text:list-item>
                    <text:p text:style-name="a1037" text:class-names="" text:cond-style-name=""><text:span text:style-name="a1036" text:class-names="">Helps protect account from password guesses due to limited attempts</text:span></text:p>
                  </text:list-item>
                </text:list>
              </text:list-item>
            </text:list>
            <text:list text:style-name="a1044">
              <text:list-item>
                <text:p text:style-name="a1043" text:class-names="" text:cond-style-name=""><text:span text:style-name="a1039" text:class-names="">minlen</text:span><text:span text:style-name="a1040" text:class-names="">=10 – minimum length of<text:s text:c="1"/></text:span><text:span text:style-name="a1041" text:class-names="">password</text:span><text:span text:style-name="a1042" text:class-names=""/></text:p>
              </text:list-item>
            </text:list>
            <text:list text:style-name="a1048">
              <text:list-item>
                <text:p text:style-name="a1047" text:class-names="" text:cond-style-name=""><text:span text:style-name="a1045" text:class-names="">lcredit</text:span><text:span text:style-name="a1046" text:class-names="">=-1 – minimum number of uppercases</text:span></text:p>
              </text:list-item>
            </text:list>
            <text:list text:style-name="a1052">
              <text:list-item>
                <text:p text:style-name="a1051" text:class-names="" text:cond-style-name=""><text:span text:style-name="a1049" text:class-names="">dcredit</text:span><text:span text:style-name="a1050" text:class-names="">=-1 – minimum number of digits</text:span></text:p>
              </text:list-item>
            </text:list>
            <text:list text:style-name="a1056">
              <text:list-item>
                <text:p text:style-name="a1055" text:class-names="" text:cond-style-name=""><text:span text:style-name="a1053" text:class-names="">ocredit</text:span><text:span text:style-name="a1054" text:class-names="">=-1 minimum number of other characters.</text:span></text:p>
              </text:list-item>
            </text:list>
            <text:list text:style-name="a1059">
              <text:list-item>
                <text:list text:style-name="a1059">
                  <text:list-item>
                    <text:p text:style-name="a1058" text:class-names="" text:cond-style-name=""><text:span text:style-name="a1057" text:class-names="">All being set to -1 means there must be at least one character.<text:s text:c="1"/></text:span></text:p>
                  </text:list-item>
                </text:list>
              </text:list-item>
            </text:list>
            <text:list text:style-name="a1062">
              <text:list-item>
                <text:list text:style-name="a1062">
                  <text:list-item>
                    <text:p text:style-name="a1061" text:class-names="" text:cond-style-name=""><text:span text:style-name="a1060" text:class-names="">Allows passwords to have a variety of characters, which limits the presence of common patterns/dictionary words &amp; increases time complexity.</text:span></text:p>
                  </text:list-item>
                </text:list>
              </text:list-item>
            </text:list>
          </draw:text-box>
          <svg:title/>
          <svg:desc/>
        </draw:frame>
        <presentation:notes draw:style-name="a1069">
          <draw:page-thumbnail draw:page-number="9" svg:x="0.75in" svg:y="1.25in" svg:width="6in" svg:height="3.375in" presentation:class="page" draw:id="id117" presentation:style-name="a1064" draw:name="Slide Image Placeholder 1">
            <svg:title/>
            <svg:desc/>
          </draw:page-thumbnail>
          <draw:frame draw:id="id118" presentation:style-name="a1065" draw:name="Notes Placeholder 2" svg:x="0.75in" svg:y="4.8125in" svg:width="6in" svg:height="3.9375in" presentation:class="notes" presentation:placeholder="true">
            <draw:text-box/>
            <svg:title/>
            <svg:desc/>
          </draw:frame>
          <draw:frame draw:id="id119" draw:style-name="a1068" draw:name="Slide Number Placeholder 3" svg:x="4.24826in" svg:y="9.49826in" svg:width="3.25in" svg:height="0.50174in">
            <draw:text-box>
              <text:p text:style-name="a1067" text:class-names="" text:cond-style-name=""><text:span text:style-name="a1066" text:class-names=""><text:page-number style:num-format="1" text:fixed="false"/></text:span></text:p>
            </draw:text-box>
            <svg:title/>
            <svg:desc/>
          </draw:frame>
        </presentation:notes>
      </draw:page>
      <draw:page draw:name="Slide11" draw:style-name="a1070" draw:master-page-name="Master1-Layout2-obj-Title-and-Content" presentation:presentation-page-layout-name="Master1-PPL2" draw:id="Slide-266">
        <draw:frame draw:id="id120" draw:style-name="a1074" draw:name="Title 1" svg:x="6.66667in" svg:y="0in" svg:width="6.66667in" svg:height="2.21918in">
          <draw:text-box>
            <text:p text:style-name="a1073" text:class-names="" text:cond-style-name=""><text:span text:style-name="a1071" text:class-names="">Solutions for preventing exploitation: Enforcing password expiry and organisation procedures</text:span><text:span text:style-name="a1072" text:class-names=""/></text:p>
          </draw:text-box>
          <svg:title/>
          <svg:desc/>
        </draw:frame>
        <draw:frame draw:id="id121" draw:style-name="a1092" draw:name="Content Placeholder 2" svg:x="6.66667in" svg:y="2.21918in" svg:width="6.66667in" svg:height="5.28082in">
          <draw:text-box>
            <text:list text:style-name="a1081">
              <text:list-item>
                <text:p text:style-name="a1080" text:class-names="" text:cond-style-name=""><text:span text:style-name="a1075" text:class-names="">sudo</text:span><text:span text:style-name="a1076" text:class-names=""><text:s text:c="1"/></text:span><text:span text:style-name="a1077" text:class-names="">chage</text:span><text:span text:style-name="a1078" text:class-names=""><text:s text:c="1"/>–M 90 –n 7 –W 14 username</text:span><text:span text:style-name="a1079" text:class-names="">(Fig 6.) – make users change their passwords every 90 days, prevents common password reuse.</text:span></text:p>
              </text:list-item>
            </text:list>
            <text:list text:style-name="a1084">
              <text:list-item>
                <text:list text:style-name="a1084">
                  <text:list-item>
                    <text:p text:style-name="a1083" text:class-names="" text:cond-style-name=""><text:span text:style-name="a1082" text:class-names="">Common reuse provides more opportunity for unauthorised access, as the same password is being used everywhere.</text:span></text:p>
                  </text:list-item>
                </text:list>
              </text:list-item>
            </text:list>
            <text:list text:style-name="a1091">
              <text:list-item>
                <text:p text:style-name="a1090" text:class-names="" text:cond-style-name=""><text:span text:style-name="a1085" text:class-names="">Users must be alerted to these<text:s text:c="1"/></text:span><text:span text:style-name="a1086" text:class-names="">password</text:span><text:span text:style-name="a1087" text:class-names=""><text:s text:c="1"/>policies<text:s text:c="1"/></text:span><text:span text:style-name="a1088" text:class-names="">and<text:s text:c="1"/></text:span><text:span text:style-name="a1089" text:class-names="">comply with them as it’s a new security practice required within the organisation.</text:span></text:p>
              </text:list-item>
            </text:list>
          </draw:text-box>
          <svg:title/>
          <svg:desc/>
        </draw:frame>
        <draw:frame draw:id="id122" draw:style-name="a1093" draw:name="Picture 6" svg:x="0in" svg:y="0.00827in" svg:width="6.66666in" svg:height="4.85132in" style:rel-width="scale" style:rel-height="scale">
          <draw:image xlink:href="media/image9.png" xlink:type="simple" xlink:show="embed" xlink:actuate="onLoad"/>
          <svg:title/>
          <svg:desc/>
        </draw:frame>
        <draw:frame draw:id="id123" draw:style-name="a1098" draw:name="TextBox 2" svg:x="0in" svg:y="4.86786in" svg:width="6.66667in" svg:height="0.5722in">
          <draw:text-box>
            <text:p text:style-name="a1095" text:class-names="" text:cond-style-name=""><text:span text:style-name="a1094" text:class-names="">Figure 7: Enforcing passwords to be changed every 90 days<text:s text:c="1"/></text:span></text:p>
            <text:p text:style-name="a1097" text:class-names="" text:cond-style-name=""><text:span text:style-name="a1096" text:class-names=""/></text:p>
          </draw:text-box>
          <svg:title/>
          <svg:desc/>
        </draw:frame>
        <draw:frame draw:id="id124" draw:style-name="a1108" draw:name="TextBox 4" svg:x="0in" svg:y="5.19563in" svg:width="6.66666in" svg:height="2.30458in">
          <draw:text-box>
            <text:list text:style-name="a1101">
              <text:list-item>
                <text:p text:style-name="a1100" text:class-names="" text:cond-style-name=""><text:span text:style-name="a1099" text:class-names="">NCSC recommendations (NCSC, 2018):</text:span></text:p>
              </text:list-item>
            </text:list>
            <text:list text:style-name="a1104">
              <text:list-item>
                <text:list text:style-name="a1104">
                  <text:list-item>
                    <text:p text:style-name="a1103" text:class-names="" text:cond-style-name=""><text:span text:style-name="a1102" text:class-names="">Use 3 random unrelated words together to make a password.</text:span></text:p>
                  </text:list-item>
                </text:list>
              </text:list-item>
            </text:list>
            <text:list text:style-name="a1107">
              <text:list-item>
                <text:list text:style-name="a1107">
                  <text:list-item>
                    <text:p text:style-name="a1106" text:class-names="" text:cond-style-name=""><text:span text:style-name="a1105" text:class-names="">Use password software managers to generate &amp; store unique passwords</text:span></text:p>
                  </text:list-item>
                </text:list>
              </text:list-item>
            </text:list>
          </draw:text-box>
          <svg:title/>
          <svg:desc/>
        </draw:frame>
        <presentation:notes draw:style-name="a1119">
          <draw:page-thumbnail draw:page-number="10" svg:x="0.75in" svg:y="1.25in" svg:width="6in" svg:height="3.375in" presentation:class="page" draw:id="id125" presentation:style-name="a1109" draw:name="Slide Image Placeholder 1">
            <svg:title/>
            <svg:desc/>
          </draw:page-thumbnail>
          <draw:frame draw:id="id126" presentation:style-name="a1115" draw:name="Notes Placeholder 2" svg:x="0.75in" svg:y="4.8125in" svg:width="6in" svg:height="3.9375in" presentation:class="notes" presentation:placeholder="false">
            <draw:text-box>
              <text:p text:style-name="a1114" text:class-names="" text:cond-style-name=""><text:span text:style-name="a1110" text:class-names="">NCSC (2018).<text:s text:c="1"/></text:span><text:span text:style-name="a1111" text:class-names="">Password administration for system owners</text:span><text:span text:style-name="a1112" text:class-names="">. [online] Ncsc.gov.uk. Available at: https://www.ncsc.gov.uk/collection/passwords/updating-your-approach.</text:span><text:span text:style-name="a1113" text:class-names=""/></text:p>
            </draw:text-box>
            <svg:title/>
            <svg:desc/>
          </draw:frame>
          <draw:frame draw:id="id127" draw:style-name="a1118" draw:name="Slide Number Placeholder 3" svg:x="4.24826in" svg:y="9.49826in" svg:width="3.25in" svg:height="0.50174in">
            <draw:text-box>
              <text:p text:style-name="a1117" text:class-names="" text:cond-style-name=""><text:span text:style-name="a1116" text:class-names=""><text:page-number style:num-format="1" text:fixed="false"/></text:span></text:p>
            </draw:text-box>
            <svg:title/>
            <svg:desc/>
          </draw:frame>
        </presentation:notes>
      </draw:page>
      <draw:page draw:name="Slide15" draw:style-name="a1120" draw:master-page-name="Master1-Layout2-obj-Title-and-Content" presentation:presentation-page-layout-name="Master1-PPL2" draw:id="Slide-270">
        <draw:frame draw:id="id128" draw:style-name="a1125" draw:name="TextBox 10" svg:x="1.355in" svg:y="6.81854in" svg:width="10.60967in" svg:height="0.70684in">
          <draw:text-box>
            <text:p text:style-name="a1124" text:class-names="" text:cond-style-name=""><text:span text:style-name="a1121" text:class-names="">Figure 8: <text:s text:c="1"/>Both employees, Grace White and Leo Thompson don’t have MFA activated<text:s text:c="1"/></text:span><text:span text:style-name="a1122" text:class-names="">on their accounts</text:span><text:span text:style-name="a1123" text:class-names="">.</text:span></text:p>
          </draw:text-box>
          <svg:title/>
          <svg:desc/>
        </draw:frame>
        <draw:frame draw:id="id129" presentation:style-name="a1142" draw:name="Content Placeholder 2" svg:x="0.79789in" svg:y="1.08in" svg:width="11.72388in" svg:height="2.78208in" presentation:class="outline" presentation:placeholder="false">
          <draw:text-box>
            <text:list text:style-name="a1128">
              <text:list-item>
                <text:p text:style-name="a1127" text:class-names="" text:cond-style-name=""><text:span text:style-name="a1126" text:class-names="">No employee has Multi-Factor Authentication set up within the organisation.</text:span></text:p>
              </text:list-item>
            </text:list>
            <text:list text:style-name="a1132">
              <text:list-item>
                <text:p text:style-name="a1131" text:class-names="" text:cond-style-name=""><text:span text:style-name="a1129" text:class-names="">Multi-Factor Authentication:</text:span><text:span text:style-name="a1130" text:class-names=""><text:s text:c="1"/>a multi-step account login process that requires users to verify themselves more than once (Amazon Web Services, 2023). After entering a password, you will need to verify that you are the correct user a second time.</text:span></text:p>
              </text:list-item>
            </text:list>
            <text:list text:style-name="a1138">
              <text:list-item>
                <text:p text:style-name="a1137" text:class-names="" text:cond-style-name=""><text:span text:style-name="a1133" text:class-names="">Having just a password as your setup within AWS, a cloud service, is very risky. Unlike Ubuntu, where password policies can be enforced locally, password-only authentication is more vulnerable because attackers have multiple ways to obtain passwords<text:s text:c="1"/></text:span><text:span text:style-name="a1134" text:class-names="">which can result in</text:span><text:span text:style-name="a1135" text:class-names=""><text:s text:c="1"/></text:span><text:span text:style-name="a1136" text:class-names="">unauthorised access and harm.</text:span></text:p>
              </text:list-item>
            </text:list>
            <text:list text:style-name="a1141">
              <text:list-item>
                <text:p text:style-name="a1140" text:class-names="" text:cond-style-name=""><text:span text:style-name="a1139" text:class-names="">This is because the cloud and its data is accessible to anyone over the internet, which makes strong authentication a mandatory requirement (Sen, n.d.).</text:span></text:p>
              </text:list-item>
            </text:list>
          </draw:text-box>
          <svg:title/>
          <svg:desc/>
        </draw:frame>
        <draw:frame draw:id="id130" presentation:style-name="a1146" draw:name="Title 1" svg:x="0.91667in" svg:y="0.15117in" svg:width="11.5in" svg:height="1.01754in" presentation:class="title" presentation:placeholder="false">
          <draw:text-box>
            <text:p text:style-name="a1145" text:class-names="" text:cond-style-name=""><text:span text:style-name="a1143" text:class-names="">Initial AWS Vulnerable Setup</text:span><text:span text:style-name="a1144" text:class-names=""/></text:p>
          </draw:text-box>
          <svg:title/>
          <svg:desc/>
        </draw:frame>
        <draw:frame draw:id="id131" draw:style-name="a1147" draw:name="Picture 3" svg:x="1.85727in" svg:y="3.86208in" svg:width="8.94207in" svg:height="2.96206in" style:rel-width="scale" style:rel-height="scale">
          <draw:image xlink:href="media/image10.png" xlink:type="simple" xlink:show="embed" xlink:actuate="onLoad"/>
          <svg:title/>
          <svg:desc/>
        </draw:frame>
        <presentation:notes draw:style-name="a1161">
          <draw:page-thumbnail draw:page-number="11" svg:x="0.75in" svg:y="1.25in" svg:width="6in" svg:height="3.375in" presentation:class="page" draw:id="id132" presentation:style-name="a1148" draw:name="Slide Image Placeholder 1">
            <svg:title/>
            <svg:desc/>
          </draw:page-thumbnail>
          <draw:frame draw:id="id133" presentation:style-name="a1157" draw:name="Notes Placeholder 2" svg:x="0.75in" svg:y="4.8125in" svg:width="6in" svg:height="3.9375in" presentation:class="notes" presentation:placeholder="false">
            <draw:text-box>
              <text:p text:style-name="a1152" text:class-names="" text:cond-style-name=""><text:span text:style-name="a1149" text:class-names="">Amazon Web Services (2023).<text:s text:c="1"/></text:span><text:span text:style-name="a1150" text:class-names="">What Is Multi-Factor Authentication (MFA)? - Cloud Security Beginner’s Guide - AWS</text:span><text:span text:style-name="a1151" text:class-names="">. [online] Amazon Web Services, Inc. Available at: https://aws.amazon.com/what-is/mfa/.</text:span></text:p>
              <text:p text:style-name="a1156" text:class-names="" text:cond-style-name=""><text:span text:style-name="a1153" text:class-names="">Sen, J. (n.d.).<text:s text:c="1"/></text:span><text:span text:style-name="a1154" text:class-names="">Security and Security and Security and Security and Privacy Privacy Privacy Privacy Issues Issues Issues Issues in C in C in C in Cloud loud loud loud Computing Computing Computing Computing</text:span><text:span text:style-name="a1155" text:class-names="">. [online] Available at: https://arxiv.org/pdf/1303.4814.</text:span></text:p>
            </draw:text-box>
            <svg:title/>
            <svg:desc/>
          </draw:frame>
          <draw:frame draw:id="id134" draw:style-name="a1160" draw:name="Slide Number Placeholder 3" svg:x="4.24826in" svg:y="9.49826in" svg:width="3.25in" svg:height="0.50174in">
            <draw:text-box>
              <text:p text:style-name="a1159" text:class-names="" text:cond-style-name=""><text:span text:style-name="a1158" text:class-names=""><text:page-number style:num-format="1" text:fixed="false"/></text:span></text:p>
            </draw:text-box>
            <svg:title/>
            <svg:desc/>
          </draw:frame>
        </presentation:notes>
      </draw:page>
      <draw:page draw:name="Slide17" draw:style-name="a1162" draw:master-page-name="Master1-Layout2-obj-Title-and-Content" presentation:presentation-page-layout-name="Master1-PPL2" draw:id="Slide-272">
        <draw:frame draw:id="id135" presentation:style-name="a1166" draw:name="Title 1" svg:x="6.66667in" svg:y="0in" svg:width="6.66667in" svg:height="1.46123in" presentation:class="title" presentation:placeholder="false">
          <draw:text-box>
            <text:p text:style-name="a1165" text:class-names="" text:cond-style-name=""><text:span text:style-name="a1163" text:class-names="">How can an AWS password be obtained</text:span><text:span text:style-name="a1164" text:class-names=""/></text:p>
          </draw:text-box>
          <svg:title/>
          <svg:desc/>
        </draw:frame>
        <draw:frame draw:id="id136" draw:style-name="a1173" draw:name="TextBox 4" svg:x="0in" svg:y="4.65205in" svg:width="6.66667in" svg:height="0.5722in">
          <draw:text-box>
            <text:p text:style-name="a1170" text:class-names="" text:cond-style-name=""><text:span text:style-name="a1167" text:class-names="">Figure<text:s text:c="1"/></text:span><text:span text:style-name="a1168" text:class-names="">9: Home page of AWS after a successful login</text:span><text:span text:style-name="a1169" text:class-names=""/></text:p>
            <text:p text:style-name="a1172" text:class-names="" text:cond-style-name=""><text:span text:style-name="a1171" text:class-names=""/></text:p>
          </draw:text-box>
          <svg:title/>
          <svg:desc/>
        </draw:frame>
        <draw:frame draw:id="id137" draw:style-name="a1195" draw:name="Content Placeholder 2" svg:x="6.66667in" svg:y="1.46123in" svg:width="6.66667in" svg:height="6.03877in">
          <draw:text-box>
            <text:list text:style-name="a1176">
              <text:list-item>
                <text:p text:style-name="a1175" text:class-names="" text:cond-style-name=""><text:span text:style-name="a1174" text:class-names="">Passwords can be obtained using multiple methods. A few methods are:</text:span></text:p>
              </text:list-item>
            </text:list>
            <text:list text:style-name="a1181">
              <text:list-item>
                <text:list text:style-name="a1181">
                  <text:list-item>
                    <text:p text:style-name="a1180" text:class-names="" text:cond-style-name=""><text:span text:style-name="a1177" text:class-names="">Password spraying</text:span><text:span text:style-name="a1178" text:class-names=""><text:s text:c="1"/>– attempting commonly used passw</text:span><text:span text:style-name="a1179" text:class-names="">ords</text:span></text:p>
                  </text:list-item>
                </text:list>
              </text:list-item>
            </text:list>
            <text:list text:style-name="a1185">
              <text:list-item>
                <text:list text:style-name="a1185">
                  <text:list-item>
                    <text:p text:style-name="a1184" text:class-names="" text:cond-style-name=""><text:span text:style-name="a1182" text:class-names="">Traffic Interception</text:span><text:span text:style-name="a1183" text:class-names=""><text:s text:c="1"/>– password can be intercepted if stored in clear text and device is accessed</text:span></text:p>
                  </text:list-item>
                </text:list>
              </text:list-item>
            </text:list>
            <text:list text:style-name="a1190">
              <text:list-item>
                <text:list text:style-name="a1190">
                  <text:list-item>
                    <text:p text:style-name="a1189" text:class-names="" text:cond-style-name=""><text:span text:style-name="a1186" text:class-names="">Rainbow Attacks:</text:span><text:span text:style-name="a1187" text:class-names=""><text:s text:c="1"/></text:span><text:span text:style-name="a1188" text:class-names="">comparing a password’s hash to hashes stored in a rainbow table</text:span></text:p>
                  </text:list-item>
                </text:list>
              </text:list-item>
            </text:list>
            <text:list text:style-name="a1194">
              <text:list-item>
                <text:list text:style-name="a1194">
                  <text:list-item>
                    <text:p text:style-name="a1193" text:class-names="" text:cond-style-name=""><text:span text:style-name="a1191" text:class-names="">Brute-force attacks:</text:span><text:span text:style-name="a1192" text:class-names=""><text:s text:c="1"/>using all possible combinations of characters in a password until the right one</text:span></text:p>
                  </text:list-item>
                </text:list>
              </text:list-item>
            </text:list>
          </draw:text-box>
          <svg:title/>
          <svg:desc/>
        </draw:frame>
        <draw:frame draw:id="id138" draw:style-name="a1196" draw:name="Picture 4" svg:x="0in" svg:y="1.46123in" svg:width="6.66666in" svg:height="3.16137in" style:rel-width="scale" style:rel-height="scale">
          <draw:image xlink:href="media/image11.png" xlink:type="simple" xlink:show="embed" xlink:actuate="onLoad"/>
          <svg:title/>
          <svg:desc/>
        </draw:frame>
      </draw:page>
      <draw:page draw:name="Slide19" draw:style-name="a1197" draw:master-page-name="Master1-Layout2-obj-Title-and-Content" presentation:presentation-page-layout-name="Master1-PPL2" draw:id="Slide-274">
        <draw:frame draw:id="id139" presentation:style-name="a1201" draw:name="Title 1" svg:x="5.68352in" svg:y="0in" svg:width="7.64982in" svg:height="1.46123in" presentation:class="title" presentation:placeholder="false">
          <draw:text-box>
            <text:p text:style-name="a1200" text:class-names="" text:cond-style-name=""><text:span text:style-name="a1198" text:class-names="">Consequences of an AWS breach</text:span><text:span text:style-name="a1199" text:class-names=""/></text:p>
          </draw:text-box>
          <svg:title/>
          <svg:desc/>
        </draw:frame>
        <draw:frame draw:id="id140" draw:style-name="a1206" draw:name="TextBox 4" svg:x="-0.00001in" svg:y="6.86048in" svg:width="5.79292in" svg:height="0.63952in">
          <draw:text-box>
            <text:p text:style-name="a1205" text:class-names="" text:cond-style-name=""><text:span text:style-name="a1202" text:class-names="">Figure<text:s text:c="1"/></text:span><text:span text:style-name="a1203" text:class-names="">9: S3 Bucket that contains folder names by department</text:span><text:span text:style-name="a1204" text:class-names=""/></text:p>
          </draw:text-box>
          <svg:title/>
          <svg:desc/>
        </draw:frame>
        <draw:frame draw:id="id141" draw:style-name="a1233" draw:name="Content Placeholder 2" svg:x="5.79291in" svg:y="1.46123in" svg:width="7.54043in" svg:height="6.03877in">
          <draw:text-box>
            <text:list text:style-name="a1209">
              <text:list-item>
                <text:p text:style-name="a1208" text:class-names="" text:cond-style-name=""><text:span text:style-name="a1207" text:class-names="">An Amazon Simple Storage Service (S3) Bucket is a storage service where users can store any amount of data (AWS, 2023).</text:span></text:p>
              </text:list-item>
            </text:list>
            <text:list text:style-name="a1212">
              <text:list-item>
                <text:p text:style-name="a1211" text:class-names="" text:cond-style-name=""><text:span text:style-name="a1210" text:class-names="">Figure 9 shows the organisation’s data, where they have 10 folders that are named after their departments. The unauthorised user has all the time to perform whatever harm they intend.</text:span></text:p>
              </text:list-item>
            </text:list>
            <text:list text:style-name="a1215">
              <text:list-item>
                <text:p text:style-name="a1214" text:class-names="" text:cond-style-name=""><text:span text:style-name="a1213" text:class-names="">There are grave consequences for a Security Breach:</text:span></text:p>
              </text:list-item>
            </text:list>
            <text:list text:style-name="a1219">
              <text:list-item>
                <text:list text:style-name="a1219">
                  <text:list-item>
                    <text:p text:style-name="a1218" text:class-names="" text:cond-style-name=""><text:span text:style-name="a1216" text:class-names="">Reputational Damage:</text:span><text:span text:style-name="a1217" text:class-names=""><text:s text:c="1"/>organisation’s reputation gets damaged, and affected customers may seek compensation or leave the service</text:span></text:p>
                  </text:list-item>
                </text:list>
              </text:list-item>
            </text:list>
            <text:list text:style-name="a1223">
              <text:list-item>
                <text:list text:style-name="a1223">
                  <text:list-item>
                    <text:p text:style-name="a1222" text:class-names="" text:cond-style-name=""><text:span text:style-name="a1220" text:class-names="">Vandalism:</text:span><text:span text:style-name="a1221" text:class-names=""><text:s text:c="1"/>a hacker may modify or delete the data they found, or obtain it for themselves</text:span></text:p>
                  </text:list-item>
                </text:list>
              </text:list-item>
            </text:list>
            <text:list text:style-name="a1227">
              <text:list-item>
                <text:list text:style-name="a1227">
                  <text:list-item>
                    <text:p text:style-name="a1226" text:class-names="" text:cond-style-name=""><text:span text:style-name="a1224" text:class-names="">Theft:</text:span><text:span text:style-name="a1225" text:class-names=""><text:s text:c="1"/>attackers may publish the data or use it for financial theft</text:span></text:p>
                  </text:list-item>
                </text:list>
              </text:list-item>
            </text:list>
            <text:list text:style-name="a1232">
              <text:list-item>
                <text:list text:style-name="a1232">
                  <text:list-item>
                    <text:p text:style-name="a1231" text:class-names="" text:cond-style-name=""><text:span text:style-name="a1228" text:class-names="">Damaged intellectual property:</text:span><text:span text:style-name="a1229" text:class-names=""><text:s text:c="1"/>competitiveness cripples if hackers steal confidential information &amp; exposure of property can remove long-term advantage.</text:span><text:span text:style-name="a1230" text:class-names=""/></text:p>
                  </text:list-item>
                </text:list>
              </text:list-item>
            </text:list>
          </draw:text-box>
          <svg:title/>
          <svg:desc/>
        </draw:frame>
        <draw:frame draw:id="id142" draw:style-name="a1234" draw:name="Picture 6" svg:x="0.10938in" svg:y="0in" svg:width="5.57414in" svg:height="6.86048in" style:rel-width="scale" style:rel-height="scale">
          <draw:image xlink:href="media/image12.png" xlink:type="simple" xlink:show="embed" xlink:actuate="onLoad"/>
          <svg:title/>
          <svg:desc/>
        </draw:frame>
        <presentation:notes draw:style-name="a1244">
          <draw:page-thumbnail draw:page-number="13" svg:x="0.75in" svg:y="1.25in" svg:width="6in" svg:height="3.375in" presentation:class="page" draw:id="id143" presentation:style-name="a1235" draw:name="Slide Image Placeholder 1">
            <svg:title/>
            <svg:desc/>
          </draw:page-thumbnail>
          <draw:frame draw:id="id144" presentation:style-name="a1240" draw:name="Notes Placeholder 2" svg:x="0.75in" svg:y="4.8125in" svg:width="6in" svg:height="3.9375in" presentation:class="notes" presentation:placeholder="false">
            <draw:text-box>
              <text:p text:style-name="a1239" text:class-names="" text:cond-style-name=""><text:span text:style-name="a1236" text:class-names="">AWS (2023).<text:s text:c="1"/></text:span><text:span text:style-name="a1237" text:class-names="">What is Amazon S3? - Amazon Simple Storage Service</text:span><text:span text:style-name="a1238" text:class-names="">. [online] docs.aws.amazon.com. Available at: https://docs.aws.amazon.com/AmazonS3/latest/userguide/Welcome.html.</text:span></text:p>
            </draw:text-box>
            <svg:title/>
            <svg:desc/>
          </draw:frame>
          <draw:frame draw:id="id145" draw:style-name="a1243" draw:name="Slide Number Placeholder 3" svg:x="4.24826in" svg:y="9.49826in" svg:width="3.25in" svg:height="0.50174in">
            <draw:text-box>
              <text:p text:style-name="a1242" text:class-names="" text:cond-style-name=""><text:span text:style-name="a1241" text:class-names=""><text:page-number style:num-format="1" text:fixed="false"/></text:span></text:p>
            </draw:text-box>
            <svg:title/>
            <svg:desc/>
          </draw:frame>
        </presentation:notes>
      </draw:page>
      <draw:page draw:name="Slide18" draw:style-name="a1245" draw:master-page-name="Master1-Layout2-obj-Title-and-Content" presentation:presentation-page-layout-name="Master1-PPL2" draw:id="Slide-273">
        <draw:frame draw:id="id146" presentation:style-name="a1249" draw:name="Title 1" svg:x="5.68352in" svg:y="0in" svg:width="7.64982in" svg:height="1.46123in" presentation:class="title" presentation:placeholder="false">
          <draw:text-box>
            <text:p text:style-name="a1248" text:class-names="" text:cond-style-name=""><text:span text:style-name="a1246" text:class-names="">Solutions for Implementing MFA in AWS</text:span><text:span text:style-name="a1247" text:class-names=""/></text:p>
          </draw:text-box>
          <svg:title/>
          <svg:desc/>
        </draw:frame>
        <draw:frame draw:id="id147" draw:style-name="a1265" draw:name="Content Placeholder 2" svg:x="5.79291in" svg:y="1.46123in" svg:width="7.54043in" svg:height="6.03877in">
          <draw:text-box>
            <text:list text:style-name="a1253">
              <text:list-item>
                <text:p text:style-name="a1252" text:class-names="" text:cond-style-name=""><text:span text:style-name="a1250" text:class-names="">Passkey or security key</text:span><text:span text:style-name="a1251" text:class-names=""><text:s text:c="1"/>– implement a fingerprint or face as your key, as they’re your natural features. They will be scanned and compared the next time you try to sign in using the method. If the features match, you log in successfully.</text:span></text:p>
              </text:list-item>
            </text:list>
            <text:list text:style-name="a1259">
              <text:list-item>
                <text:p text:style-name="a1258" text:class-names="" text:cond-style-name=""><text:span text:style-name="a1254" text:class-names="">Authenticator app</text:span><text:span text:style-name="a1255" text:class-names=""><text:s text:c="1"/>– connect the account with an authenticator app on your phone. After each login attempt, you use the app to verify that you’re the right user by entering a different code given each time. If you enter the right<text:s text:c="1"/></text:span><text:span text:style-name="a1256" text:class-names="">code</text:span><text:span text:style-name="a1257" text:class-names=""><text:s text:c="1"/>you log in.</text:span></text:p>
              </text:list-item>
            </text:list>
            <text:list text:style-name="a1264">
              <text:list-item>
                <text:p text:style-name="a1263" text:class-names="" text:cond-style-name=""><text:span text:style-name="a1260" text:class-names="">Hardware TOTP token</text:span><text:span text:style-name="a1261" text:class-names=""><text:s text:c="1"/>– uses a physical device to generate one-time passcodes. If the hacker logs in with your password, they cannot access your account as they need the code from the hardware.</text:span><text:span text:style-name="a1262" text:class-names=""/></text:p>
              </text:list-item>
            </text:list>
          </draw:text-box>
          <svg:title/>
          <svg:desc/>
        </draw:frame>
        <draw:frame draw:id="id148" draw:style-name="a1266" draw:name="Picture 10" svg:x="-0.00001in" svg:y="0.62627in" svg:width="5.68352in" svg:height="6.23421in" style:rel-width="scale" style:rel-height="scale">
          <draw:image xlink:href="media/image13.png" xlink:type="simple" xlink:show="embed" xlink:actuate="onLoad"/>
          <svg:title/>
          <svg:desc/>
        </draw:frame>
        <draw:frame draw:id="id149" draw:style-name="a1271" draw:name="TextBox 4" svg:x="-0.00001in" svg:y="6.86048in" svg:width="5.68352in" svg:height="0.37025in">
          <draw:text-box>
            <text:p text:style-name="a1270" text:class-names="" text:cond-style-name=""><text:span text:style-name="a1267" text:class-names="">Figure 10</text:span><text:span text:style-name="a1268" text:class-names="">: MFA methods in AWS</text:span><text:span text:style-name="a1269" text:class-names=""/></text:p>
          </draw:text-box>
          <svg:title/>
          <svg:desc/>
        </draw:frame>
      </draw:page>
      <draw:page draw:name="Slide20" draw:style-name="a1272" draw:master-page-name="Master1-Layout2-obj-Title-and-Content" presentation:presentation-page-layout-name="Master1-PPL2" draw:id="Slide-275">
        <draw:frame draw:id="id150" presentation:style-name="a1276" draw:name="Title 1" svg:x="1.14667in" svg:y="0.24in" svg:width="11.04in" svg:height="1.46123in" presentation:class="title" presentation:placeholder="false">
          <draw:text-box>
            <text:p text:style-name="a1275" text:class-names="" text:cond-style-name=""><text:span text:style-name="a1273" text:class-names="">Solutions for Implementing MFA in AWS</text:span><text:span text:style-name="a1274" text:class-names=""/></text:p>
          </draw:text-box>
          <svg:title/>
          <svg:desc/>
        </draw:frame>
        <draw:frame draw:id="id151" draw:style-name="a1294" draw:name="Content Placeholder 2" svg:x="0.91333in" svg:y="2.24123in" svg:width="11.50667in" svg:height="5.01877in">
          <draw:text-box>
            <text:list text:style-name="a1280">
              <text:list-item>
                <text:p text:style-name="a1279" text:class-names="" text:cond-style-name=""><text:span text:style-name="a1277" text:class-names="">Implement MFA as a policy within the business –<text:s text:c="1"/></text:span><text:span text:style-name="a1278" text:class-names="">Users must be alerted about implementing MFA and comply with it. It is possible to view who has implemented it using the Identity Access Management(IAM) Users page.</text:span></text:p>
              </text:list-item>
            </text:list>
            <text:list text:style-name="a1284">
              <text:list-item>
                <text:p text:style-name="a1283" text:class-names="" text:cond-style-name=""><text:span text:style-name="a1281" text:class-names="">Still implement a strong password regardless of MFA being used</text:span><text:span text:style-name="a1282" text:class-names=""><text:s text:c="1"/>– The NCSC recommendations of using 3 random unrelated words together to make a password, which increases time complexity, still stand in AWS.</text:span></text:p>
              </text:list-item>
            </text:list>
            <text:list text:style-name="a1290">
              <text:list-item>
                <text:list text:style-name="a1290">
                  <text:list-item>
                    <text:p text:style-name="a1289" text:class-names="" text:cond-style-name=""><text:span text:style-name="a1285" text:class-names="">If you want to<text:s text:c="1"/></text:span><text:span text:style-name="a1286" text:class-names="">refer back</text:span><text:span text:style-name="a1287" text:class-names=""><text:s text:c="1"/>to the password, use password software managers to generate &amp; store unique passwords</text:span><text:span text:style-name="a1288" text:class-names=""/></text:p>
                  </text:list-item>
                </text:list>
              </text:list-item>
            </text:list>
            <text:list text:style-name="a1293">
              <text:list-item>
                <text:p text:style-name="a1292" text:class-names="" text:cond-style-name=""><text:span text:style-name="a1291" text:class-names=""/></text:p>
              </text:list-item>
            </text:list>
          </draw:text-box>
          <svg:title/>
          <svg:desc/>
        </draw:frame>
      </draw:page>
      <draw:page draw:name="Slide12" draw:style-name="a1295" draw:master-page-name="Master1-Layout2-obj-Title-and-Content" presentation:presentation-page-layout-name="Master1-PPL2" draw:id="Slide-267">
        <draw:frame draw:id="id152" presentation:style-name="a1299" draw:name="Title 1" svg:x="0.91667in" svg:y="0.39931in" svg:width="11.5in" svg:height="1.44965in" presentation:class="title" presentation:placeholder="false">
          <draw:text-box>
            <text:p text:style-name="a1298" text:class-names="" text:cond-style-name=""><text:span text:style-name="a1296" text:class-names="">Summary</text:span><text:span text:style-name="a1297" text:class-names=""/></text:p>
          </draw:text-box>
          <svg:title/>
          <svg:desc/>
        </draw:frame>
        <draw:frame draw:id="id153" presentation:style-name="a1318" draw:name="Content Placeholder 2" svg:x="0.91667in" svg:y="1.99653in" svg:width="11.5in" svg:height="4.75868in" presentation:class="outline" presentation:placeholder="false">
          <draw:text-box>
            <text:list text:style-name="a1302">
              <text:list-item>
                <text:p text:style-name="a1301" text:class-names="" text:cond-style-name=""><text:span text:style-name="a1300" text:class-names="">Authentication verifies a user’s identity to access a system, protecting against unauthorised access.</text:span></text:p>
              </text:list-item>
            </text:list>
            <text:list text:style-name="a1305">
              <text:list-item>
                <text:p text:style-name="a1304" text:class-names="" text:cond-style-name=""><text:span text:style-name="a1303" text:class-names=""><text:s text:c="1"/>The system can become vulnerable if password policies aren’t in place, as it allows weak passwords to be implemented.</text:span></text:p>
              </text:list-item>
            </text:list>
            <text:list text:style-name="a1308">
              <text:list-item>
                <text:p text:style-name="a1307" text:class-names="" text:cond-style-name=""><text:span text:style-name="a1306" text:class-names="">Using Linux, easy passwords can be discovered in a short time frame using a user’s data and their password hash.</text:span></text:p>
              </text:list-item>
            </text:list>
            <text:list text:style-name="a1311">
              <text:list-item>
                <text:p text:style-name="a1310" text:class-names="" text:cond-style-name=""><text:span text:style-name="a1309" text:class-names="">The cloud is accessible to anyone who is on the internet, which makes MFA a mandatory security procedure.</text:span></text:p>
              </text:list-item>
            </text:list>
            <text:list text:style-name="a1314">
              <text:list-item>
                <text:p text:style-name="a1313" text:class-names="" text:cond-style-name=""><text:span text:style-name="a1312" text:class-names="">Users must be alerted and comply with new password policies.</text:span></text:p>
              </text:list-item>
            </text:list>
            <text:list text:style-name="a1317">
              <text:list-item>
                <text:p text:style-name="a1316" text:class-names="" text:cond-style-name=""><text:span text:style-name="a1315" text:class-names="">Password policies include password requirements, password expiry dates and MFA.</text:span></text:p>
              </text:list-item>
            </text:list>
          </draw:text-box>
          <svg:title/>
          <svg:desc/>
        </draw:frame>
      </draw:page>
      <draw:page draw:name="Slide14" draw:style-name="a1319" draw:master-page-name="Master1-Layout2-obj-Title-and-Content" presentation:presentation-page-layout-name="Master1-PPL2" draw:id="Slide-269">
        <draw:frame draw:id="id154" presentation:style-name="a1323" draw:name="Title 1" svg:x="0in" svg:y="0.01997in" svg:width="13.33333in" svg:height="1.22565in" presentation:class="title" presentation:placeholder="false">
          <draw:text-box>
            <text:p text:style-name="a1322" text:class-names="" text:cond-style-name=""><text:span text:style-name="a1320" text:class-names="">References</text:span><text:span text:style-name="a1321" text:class-names=""/></text:p>
          </draw:text-box>
          <svg:title/>
          <svg:desc/>
        </draw:frame>
        <draw:frame draw:id="id155" presentation:style-name="a1365" draw:name="Content Placeholder 2" svg:x="0in" svg:y="1.24561in" svg:width="13.33333in" svg:height="6.12934in" presentation:class="outline" presentation:placeholder="false">
          <draw:text-box>
            <text:list text:style-name="a1330">
              <text:list-item>
                <text:p text:style-name="a1329" text:class-names="" text:cond-style-name=""><text:span text:style-name="a1324" text:class-names="">National Cyber Security Centre (2022).<text:s text:c="1"/></text:span><text:span text:style-name="a1325" text:class-names="">Selecting right methods to authenticate customers</text:span><text:span text:style-name="a1326" text:class-names="">. [online] Available at:<text:s text:c="1"/></text:span><text:span text:style-name="a1327" text:class-names=""><text:a xlink:href="https://www.ncsc.gov.uk/guidance/authentication-methods-choosing-the-right-type" text:style-name="" text:visited-style-name="">https://www.ncsc.gov.uk/guidance/authentication-methods-choosing-the-right-type</text:a></text:span><text:span text:style-name="a1328" text:class-names=""/></text:p>
              </text:list-item>
            </text:list>
            <text:list text:style-name="a1339">
              <text:list-item>
                <text:p text:style-name="a1338" text:class-names="" text:cond-style-name=""><text:span text:style-name="a1331" text:class-names="">National Cyber Security Centre (2019)<text:s text:c="1"/></text:span><text:span text:style-name="a1332" text:class-names="">Most hacked passwords revealed as UK cyber survey exposes gaps in online security</text:span><text:span text:style-name="a1333" text:class-names="">,<text:s text:c="1"/></text:span><text:span text:style-name="a1334" text:class-names="">Ncsc.gov.uk</text:span><text:span text:style-name="a1335" text:class-names="">. Available at:<text:s text:c="1"/></text:span><text:span text:style-name="a1336" text:class-names=""><text:a xlink:href="https://www.ncsc.gov.uk/news/most-hacked-passwords-revealed-as-uk-cyber-survey-exposes-gaps-in-online-security" text:style-name="" text:visited-style-name="">https://www.ncsc.gov.uk/news/most-hacked-passwords-revealed-as-uk-cyber-survey-exposes-gaps-in-online-security</text:a></text:span><text:span text:style-name="a1337" text:class-names=""/></text:p>
              </text:list-item>
            </text:list>
            <text:list text:style-name="a1346">
              <text:list-item>
                <text:p text:style-name="a1345" text:class-names="" text:cond-style-name=""><text:span text:style-name="a1340" text:class-names="">The_Anshuman (2023).<text:s text:c="1"/></text:span><text:span text:style-name="a1341" text:class-names="">Understanding /etc/passwd and /etc/shadow Files - The_Anshuman - Medium</text:span><text:span text:style-name="a1342" text:class-names="">. [online] Medium. Available at:<text:s text:c="1"/></text:span><text:span text:style-name="a1343" text:class-names=""><text:a xlink:href="https://medium.com/@The_Anshuman/understanding-etc-passwd-and-etc-shadow-files-58630eb0eda8" text:style-name="" text:visited-style-name="">https://medium.com/@The_Anshuman/understanding-etc-passwd-and-etc-shadow-files-58630eb0eda8</text:a></text:span><text:span text:style-name="a1344" text:class-names="">.</text:span></text:p>
              </text:list-item>
            </text:list>
            <text:list text:style-name="a1353">
              <text:list-item>
                <text:p text:style-name="a1352" text:class-names="" text:cond-style-name=""><text:span text:style-name="a1347" text:class-names="">Canonical (2019).<text:s text:c="1"/></text:span><text:span text:style-name="a1348" text:class-names="">Ubuntu Manpage: pam_pwquality - PAM module to perform password quality checking</text:span><text:span text:style-name="a1349" text:class-names="">. [online] Ubuntu.com. Available at:<text:s text:c="1"/></text:span><text:span text:style-name="a1350" text:class-names=""><text:a xlink:href="https://manpages.ubuntu.com/manpages/jammy/man8/pam_pwquality.8.html" text:style-name="" text:visited-style-name="">https://manpages.ubuntu.com/manpages/jammy/man8/pam_pwquality.8.html</text:a></text:span><text:span text:style-name="a1351" text:class-names="">.</text:span></text:p>
              </text:list-item>
            </text:list>
            <text:list text:style-name="a1361">
              <text:list-item>
                <text:p text:style-name="a1360" text:class-names="" text:cond-style-name=""><text:span text:style-name="a1354" text:class-names="">NCSC (2018).<text:s text:c="1"/></text:span><text:span text:style-name="a1355" text:class-names="">Password administration for system owners</text:span><text:span text:style-name="a1356" text:class-names="">. [online] Ncsc.gov.uk. Available at:<text:s text:c="1"/></text:span><text:span text:style-name="a1357" text:class-names=""><text:a xlink:href="https://www.ncsc.gov.uk/collection/passwords/updating-your-approach" text:style-name="" text:visited-style-name="">https://www.ncsc.gov.uk/collection/passwords/updating-your-approach</text:a></text:span><text:span text:style-name="a1358" text:class-names="">.</text:span><text:span text:style-name="a1359" text:class-names=""/></text:p>
              </text:list-item>
            </text:list>
            <text:list text:style-name="a1364">
              <text:list-item>
                <text:p text:style-name="a1363" text:class-names="" text:cond-style-name=""><text:span text:style-name="a1362" text:class-names=""/></text:p>
              </text:list-item>
            </text:list>
          </draw:text-box>
          <svg:title/>
          <svg:desc/>
        </draw:frame>
      </draw:page>
      <draw:page draw:name="Slide16" draw:style-name="a1366" draw:master-page-name="Master1-Layout2-obj-Title-and-Content" presentation:presentation-page-layout-name="Master1-PPL2" draw:id="Slide-271">
        <draw:frame draw:id="id156" presentation:style-name="a1370" draw:name="Title 1" svg:x="0in" svg:y="0.01997in" svg:width="13.33333in" svg:height="1.22565in" presentation:class="title" presentation:placeholder="false">
          <draw:text-box>
            <text:p text:style-name="a1369" text:class-names="" text:cond-style-name=""><text:span text:style-name="a1367" text:class-names="">References</text:span><text:span text:style-name="a1368" text:class-names=""/></text:p>
          </draw:text-box>
          <svg:title/>
          <svg:desc/>
        </draw:frame>
        <draw:frame draw:id="id157" presentation:style-name="a1387" draw:name="Content Placeholder 2" svg:x="0in" svg:y="1.24561in" svg:width="13.33333in" svg:height="6.12934in" presentation:class="outline" presentation:placeholder="false">
          <draw:text-box>
            <text:list text:style-name="a1373">
              <text:list-item>
                <text:p text:style-name="a1372" text:class-names="" text:cond-style-name=""><text:span text:style-name="a1371" text:class-names="">Amazon Web Services (2023). What Is Multi-Factor Authentication (MFA)? - Cloud Security Beginner’s Guide - AWS. [online] Amazon Web Services, Inc. Available at: https://aws.amazon.com/what-is/mfa/.</text:span></text:p>
              </text:list-item>
            </text:list>
            <text:list text:style-name="a1376">
              <text:list-item>
                <text:p text:style-name="a1375" text:class-names="" text:cond-style-name=""><text:span text:style-name="a1374" text:class-names="">Sen, J. (n.d.). Security and Security and Security and Security and Privacy Privacy Privacy Privacy Issues Issues Issues Issues in C in C in C in Cloud loud loud loud Computing Computing Computing Computing. [online] Available at: https://arxiv.org/pdf/1303.4814.</text:span></text:p>
              </text:list-item>
            </text:list>
            <text:list text:style-name="a1383">
              <text:list-item>
                <text:p text:style-name="a1382" text:class-names="" text:cond-style-name=""><text:span text:style-name="a1377" text:class-names=""><text:s text:c="1"/>AWS (2023).<text:s text:c="1"/></text:span><text:span text:style-name="a1378" text:class-names="">What is Amazon S3? - Amazon Simple Storage Service</text:span><text:span text:style-name="a1379" text:class-names="">. [online] docs.aws.amazon.com. Available at:<text:s text:c="1"/></text:span><text:span text:style-name="a1380" text:class-names=""><text:a xlink:href="https://docs.aws.amazon.com/AmazonS3/latest/userguide/Welcome.html" text:style-name="" text:visited-style-name="">https://docs.aws.amazon.com/AmazonS3/latest/userguide/Welcome.html</text:a></text:span><text:span text:style-name="a1381" text:class-names="">.</text:span></text:p>
              </text:list-item>
            </text:list>
            <text:list text:style-name="a1386">
              <text:list-item>
                <text:p text:style-name="a1385" text:class-names="" text:cond-style-name=""><text:span text:style-name="a138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30/05/2026</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30/05/2026</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30/05/2026</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30/05/2026</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30/05/2026</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30/05/2026</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30/05/2026</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30/05/2026</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30/05/2026</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30/05/2026</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30/05/2026</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30/05/2026</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30/05/2026</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30/05/2026</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30/05/2026</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30/05/2026</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30/05/2026</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30/05/2026</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30/05/2026</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30/05/2026</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30/05/2026</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30/05/2026</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30/05/2026</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30/05/2026</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Ayman Boucheneb</meta:initial-creator>
    <dc:creator>Ayman Boucheneb</dc:creator>
    <meta:creation-date>2026-05-26T09:28:22Z</meta:creation-date>
    <dc:date>2026-05-30T08:20:06Z</dc:date>
    <meta:editing-cycles>12</meta:editing-cycles>
    <meta:editing-duration>PT18377S</meta:editing-duration>
    <meta:document-statistic meta:paragraph-count="126" meta:word-count="2423"/>
  </office:meta>
</office:document-meta>
</file>