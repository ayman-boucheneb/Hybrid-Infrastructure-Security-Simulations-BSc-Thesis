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032" style:parent-style-name="Graphics">
      <style:graphic-properties draw:fill="none" draw:stroke="non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middle" draw:textarea-horizontal-align="center" draw:fill="none" draw:stroke="solid" svg:stroke-width="0.0625in" svg:stroke-color="#ff0000" svg:stroke-opacity="100%" draw:stroke-linejoin="miter" svg:stroke-linecap="butt" draw:auto-grow-width="false" draw:auto-grow-height="false"/>
      <style:paragraph-properties style:font-independent-line-spacing="true" style:writing-mode="lr-tb"/>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middle" draw:textarea-horizontal-align="center" draw:fill="none" draw:stroke="solid" svg:stroke-width="0.0625in" svg:stroke-color="#ff0000" svg:stroke-opacity="100%" draw:stroke-linejoin="miter" svg:stroke-linecap="butt"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80">
      <style:graphic-properties draw:fill="none" draw:stroke="solid" svg:stroke-width="0.01389in" svg:stroke-color="#000000" svg:stroke-opacity="100%"/>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7030a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8">
      <style:text-properties fo:font-variant="normal" fo:text-transform="none" fo:color="#7030a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1047">
      <style:graphic-properties draw:fill="none" draw:stroke="solid" svg:stroke-width="0.01389in" svg:stroke-color="#000000" svg:stroke-opacity="100%"/>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8">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6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9">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2">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75" style:parent-style-name="Graphics">
      <style:graphic-properties draw:fill="none" draw:stroke="none"/>
    </style:style>
    <style:style style:family="graphic" style:name="a976" style:parent-style-name="Graphics">
      <style:graphic-properties draw:fill="none" fo:clip="rect(0.00003in, 0in, 1.1691in, 0in)" draw:stroke="none"/>
    </style:style>
    <style:style style:family="graphic" style:name="a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1" style:parent-style-name="Graphics">
      <style:graphic-properties draw:fill="none" draw:stroke="non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32" style:parent-style-name="Graphics">
      <style:graphic-properties draw:fill="none" draw:stroke="non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76" style:parent-style-name="Graphics">
      <style:graphic-properties draw:fill="none" draw:stroke="non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47" style:parent-style-name="Graphics">
      <style:graphic-properties draw:fill="none" draw:stroke="non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084" style:parent-style-name="Graphics">
      <style:graphic-properties draw:fill="none" draw:stroke="non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parent-style-name="Graphics">
      <style:graphic-properties draw:fill="none" draw:stroke="none"/>
    </style:style>
    <style:style style:family="graphic" style:name="a1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5">
      <style:text-properties fo:font-variant="normal" fo:text-transform="none" fo:color="#7030a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7030a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parent-style-name="Graphics">
      <style:graphic-properties draw:fill="none" fo:clip="rect(2.08647in, 0in, 0in, 0in)" draw:stroke="none"/>
    </style:style>
    <style:style style:family="presentation" style:name="a991">
      <style:graphic-properties draw:fill="none" draw:stroke="solid" svg:stroke-width="0.01389in" svg:stroke-color="#000000" svg:stroke-opacity="100%"/>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8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6">
      <style:text-properties fo:font-variant="normal" fo:text-transform="none" fo:color="#7030a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7030a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94">
      <style:text-properties fo:font-variant="normal" fo:text-transform="none" fo:color="#7030a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5">
      <style:text-properties fo:font-variant="normal" fo:text-transform="none" fo:color="#7030a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1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draw:fill="none" draw:stroke="solid" svg:stroke-width="0.01389in" svg:stroke-color="#000000" svg:stroke-opacity="100%"/>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7030a0"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6">
      <style:text-properties fo:font-variant="normal" fo:text-transform="none" fo:color="#7030a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7030a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7030a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7030a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6" style:parent-style-name="Graphics">
      <style:graphic-properties draw:fill="none" fo:clip="rect(0in, 0.00011in, 0.33286in, 0in)" draw:stroke="none"/>
    </style:style>
    <style:style style:family="graphic" style:name="a737" style:parent-style-name="Graphics">
      <style:graphic-properties draw:fill="none" fo:clip="rect(0in, 6.76747in, 0in, 9.71253in)" draw:stroke="none"/>
    </style:style>
    <style:style style:family="drawing-page" style:name="a7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9">
      <style:text-properties fo:font-variant="normal" fo:text-transform="none" fo:color="#7030a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6" style:parent-style-name="Graphics">
      <style:graphic-properties draw:fill="none" draw:stroke="none"/>
    </style:style>
    <style:style style:family="text" style:name="a740">
      <style:text-properties fo:font-variant="normal" fo:text-transform="none" fo:color="#7030a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parent-style-name="Graphics">
      <style:graphic-properties draw:fill="none" draw:stroke="none"/>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888" style:parent-style-name="Graphics">
      <style:graphic-properties draw:fill="none" draw:stroke="none"/>
    </style:style>
    <style:style style:family="graphic" style:name="a90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9" style:parent-style-name="Graphics">
      <style:graphic-properties draw:fill="none" draw:stroke="non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30% 66.6667%"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1">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752">
      <style:text-properties fo:font-variant="normal" fo:text-transform="none" fo:color="#7030a0" style:text-line-through-type="none" style:text-line-through-style="none" style:text-line-through-width="auto" style:text-line-through-color="font-color" style:text-position="0% 100%" fo:font-family="Aptos Display" fo:font-size="0.68056in" style:font-size-asian="0.68056in" style:font-size-complex="0.6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7030a0" style:text-line-through-type="none" style:text-line-through-style="none" style:text-line-through-width="auto" style:text-line-through-color="font-color" style:text-position="0% 100%" fo:font-family="Aptos Display" fo:font-size="0.68056in" style:font-size-asian="0.68056in" style:font-size-complex="0.6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6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7030a0" style:text-line-through-type="none" style:text-line-through-style="none" style:text-line-through-width="auto" style:text-line-through-color="font-color" style:text-position="0% 100%" fo:font-family="Aptos Display"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7030a0" style:text-line-through-type="none" style:text-line-through-style="none" style:text-line-through-width="auto" style:text-line-through-color="font-color" style:text-position="0% 100%" fo:font-family="Aptos Display"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67">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7030a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3">
      <style:text-properties fo:font-variant="normal" fo:text-transform="none" fo:color="#7030a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parent-style-name="Graphics">
      <style:graphic-properties draw:fill="none" draw:stroke="none"/>
    </style:style>
    <style:style style:family="graphic" style:name="a1031" style:parent-style-name="Graphics">
      <style:graphic-properties draw:fill="none" draw:stroke="none"/>
    </style:style>
    <text:list-style style:name="a778">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5">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6">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2">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5">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8">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6">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7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728" draw:master-page-name="Master1-Layout1-title-Title-Slide" presentation:presentation-page-layout-name="Master1-PPL1" draw:id="Slide-257">
        <draw:frame draw:id="id69" presentation:style-name="a731" draw:name="Title 1" svg:x="5.7937in" svg:y="0.7in" svg:width="6.8363in" svg:height="3.9in" presentation:class="title" presentation:placeholder="false">
          <draw:text-box>
            <text:p text:style-name="a730" text:class-names="" text:cond-style-name=""><text:span text:style-name="a729" text:class-names="">Security Principle 3: Network Security</text:span></text:p>
          </draw:text-box>
          <svg:title/>
          <svg:desc/>
        </draw:frame>
        <draw:frame draw:id="id70" presentation:style-name="a735" draw:name="Subtitle 2" svg:x="5.7937in" svg:y="5.07in" svg:width="6.8363in" svg:height="1.72in" presentation:class="subtitle" presentation:placeholder="false">
          <draw:text-box>
            <text:p text:style-name="a734" text:class-names="" text:cond-style-name=""><text:span text:style-name="a732" text:class-names="">Securing out Networks</text:span><text:span text:style-name="a733" text:class-names=""/></text:p>
          </draw:text-box>
          <svg:title/>
          <svg:desc/>
        </draw:frame>
        <draw:frame draw:id="id71" draw:style-name="a736" draw:name="Picture 7" svg:x="0in" svg:y="0.00001in" svg:width="5.09333in" svg:height="7.49999in" style:rel-width="scale" style:rel-height="scale">
          <draw:image xlink:href="media/image1.png" xlink:type="simple" xlink:show="embed" xlink:actuate="onLoad"/>
          <svg:title/>
          <svg:desc>A tablet with a key and a lock

AI-generated content may be incorrect.</svg:desc>
        </draw:frame>
        <draw:frame draw:id="id72" draw:style-name="a737" draw:name="Picture 2" svg:x="0in" svg:y="-0.00001in" svg:width="5.09333in" svg:height="7.5in" style:rel-width="scale" style:rel-height="scale">
          <draw:image xlink:href="media/image2.jpeg" xlink:type="simple" xlink:show="embed" xlink:actuate="onLoad"/>
          <svg:title/>
          <svg:desc>What Is Network Security? Definition, Types, and Best Practices in 2024</svg:desc>
        </draw:frame>
      </draw:page>
      <draw:page draw:name="Slide3" draw:style-name="a738" draw:master-page-name="Master1-Layout2-obj-Title-and-Content" presentation:presentation-page-layout-name="Master1-PPL2" draw:id="Slide-258">
        <draw:frame draw:id="id73" presentation:style-name="a742" draw:name="Title 1" svg:x="0.91667in" svg:y="0.39931in" svg:width="11.5in" svg:height="1.44965in" presentation:class="title" presentation:placeholder="false">
          <draw:text-box>
            <text:p text:style-name="a741" text:class-names="" text:cond-style-name=""><text:span text:style-name="a739" text:class-names="">What is Network Security?</text:span><text:span text:style-name="a740" text:class-names=""/></text:p>
          </draw:text-box>
          <svg:title/>
          <svg:desc/>
        </draw:frame>
        <draw:frame draw:id="id74" presentation:style-name="a750" draw:name="Content Placeholder 2" svg:x="0.91667in" svg:y="1.99653in" svg:width="11.5in" svg:height="4.75868in" presentation:class="outline" presentation:placeholder="false">
          <draw:text-box>
            <text:list text:style-name="a746">
              <text:list-item>
                <text:p text:style-name="a745" text:class-names="" text:cond-style-name=""><text:span text:style-name="a743" text:class-names="">Network Security</text:span><text:span text:style-name="a744" text:class-names="">: protection of computer networks from internal and external cyberattacks.</text:span></text:p>
              </text:list-item>
            </text:list>
            <text:list text:style-name="a749">
              <text:list-item>
                <text:p text:style-name="a748" text:class-names="" text:cond-style-name=""><text:span text:style-name="a747" text:class-names="">It is to ensure communications and operations within a network can operate as usual and avoid disturbance from any attacks.</text:span></text:p>
              </text:list-item>
            </text:list>
          </draw:text-box>
          <svg:title/>
          <svg:desc/>
        </draw:frame>
      </draw:page>
      <draw:page draw:name="Slide4" draw:style-name="a751" draw:master-page-name="Master1-Layout2-obj-Title-and-Content" presentation:presentation-page-layout-name="Master1-PPL2" draw:id="Slide-259">
        <draw:frame draw:id="id75" presentation:style-name="a755" draw:name="Title 1" svg:x="0.90983in" svg:y="0in" svg:width="11.5in" svg:height="1.44965in" presentation:class="title" presentation:placeholder="false">
          <draw:text-box>
            <text:p text:style-name="a754" text:class-names="" text:cond-style-name=""><text:span text:style-name="a752" text:class-names="">Why does Network Security matter?</text:span><text:span text:style-name="a753" text:class-names=""/></text:p>
          </draw:text-box>
          <svg:title/>
          <svg:desc/>
        </draw:frame>
        <draw:frame draw:id="id76" presentation:style-name="a779" draw:name="Content Placeholder 2" svg:x="0.61612in" svg:y="1.84754in" svg:width="12.08743in" svg:height="5.21053in" presentation:class="outline" presentation:placeholder="false">
          <draw:text-box>
            <text:list text:style-name="a758">
              <text:list-item>
                <text:p text:style-name="a757" text:class-names="" text:cond-style-name=""><text:span text:style-name="a756" text:class-names="">Network security matters because of its main aims:</text:span></text:p>
              </text:list-item>
            </text:list>
            <text:list text:style-name="a761">
              <text:list-item>
                <text:list text:style-name="a761">
                  <text:list-item>
                    <text:p text:style-name="a760" text:class-names="" text:cond-style-name=""><text:span text:style-name="a759" text:class-names="">prevent unauthorised access to resources</text:span></text:p>
                  </text:list-item>
                </text:list>
              </text:list-item>
            </text:list>
            <text:list text:style-name="a764">
              <text:list-item>
                <text:list text:style-name="a764">
                  <text:list-item>
                    <text:p text:style-name="a763" text:class-names="" text:cond-style-name=""><text:span text:style-name="a762" text:class-names="">detect and stop cyberattacks</text:span></text:p>
                  </text:list-item>
                </text:list>
              </text:list-item>
            </text:list>
            <text:list text:style-name="a767">
              <text:list-item>
                <text:list text:style-name="a767">
                  <text:list-item>
                    <text:p text:style-name="a766" text:class-names="" text:cond-style-name=""><text:span text:style-name="a765" text:class-names="">ensure authorised users have the access they should have.</text:span></text:p>
                  </text:list-item>
                </text:list>
              </text:list-item>
            </text:list>
            <text:list text:style-name="a770">
              <text:list-item>
                <text:p text:style-name="a769" text:class-names="" text:cond-style-name=""><text:span text:style-name="a768" text:class-names="">New technologies such as Artificial Intelligence and Internet of Things are entering our daily lives. As new technologies continue to develop and influence our lives, the size of the attack surface hackers can exploit increases (IBM, 2021).</text:span></text:p>
              </text:list-item>
            </text:list>
            <text:list text:style-name="a775">
              <text:list-item>
                <text:p text:style-name="a774" text:class-names="" text:cond-style-name=""><text:span text:style-name="a771" text:class-names="">Let's see what happens when Network Security fails in Ubuntu and AWS, and<text:s text:c="1"/></text:span><text:span text:style-name="a772" text:class-names="">how to fix it</text:span><text:span text:style-name="a773" text:class-names="">.</text:span></text:p>
              </text:list-item>
            </text:list>
            <text:list text:style-name="a778">
              <text:list-item>
                <text:list text:style-name="a778">
                  <text:list-item>
                    <text:p text:style-name="a777" text:class-names="" text:cond-style-name=""><text:span text:style-name="a776" text:class-names=""/></text:p>
                  </text:list-item>
                </text:list>
              </text:list-item>
            </text:list>
          </draw:text-box>
          <svg:title/>
          <svg:desc/>
        </draw:frame>
        <presentation:notes draw:style-name="a785">
          <draw:page-thumbnail draw:page-number="3" svg:x="0.75in" svg:y="1.25in" svg:width="6in" svg:height="3.375in" presentation:class="page" draw:id="id77" presentation:style-name="a780" draw:name="Slide Image Placeholder 1">
            <svg:title/>
            <svg:desc/>
          </draw:page-thumbnail>
          <draw:frame draw:id="id78" presentation:style-name="a781" draw:name="Notes Placeholder 2" svg:x="0.75in" svg:y="4.8125in" svg:width="6in" svg:height="3.9375in" presentation:class="notes" presentation:placeholder="true">
            <draw:text-box/>
            <svg:title/>
            <svg:desc/>
          </draw:frame>
          <draw:frame draw:id="id79" draw:style-name="a784" draw:name="Slide Number Placeholder 3" svg:x="4.24826in" svg:y="9.49826in" svg:width="3.25in" svg:height="0.50174in">
            <draw:text-box>
              <text:p text:style-name="a783" text:class-names="" text:cond-style-name=""><text:span text:style-name="a782" text:class-names=""><text:page-number style:num-format="1" text:fixed="false"/></text:span></text:p>
            </draw:text-box>
            <svg:title/>
            <svg:desc/>
          </draw:frame>
        </presentation:notes>
      </draw:page>
      <draw:page draw:name="Slide5" draw:style-name="a786" draw:master-page-name="Master1-Layout2-obj-Title-and-Content" presentation:presentation-page-layout-name="Master1-PPL2" draw:id="Slide-260">
        <draw:frame draw:id="id80" presentation:style-name="a790" draw:name="Title 1" svg:x="6.66667in" svg:y="0in" svg:width="6.66667in" svg:height="1.46123in" presentation:class="title" presentation:placeholder="false">
          <draw:text-box>
            <text:p text:style-name="a789" text:class-names="" text:cond-style-name=""><text:span text:style-name="a787" text:class-names="">Initial Linux Vulnerable Setup</text:span><text:span text:style-name="a788" text:class-names=""/></text:p>
          </draw:text-box>
          <svg:title/>
          <svg:desc/>
        </draw:frame>
        <draw:frame draw:id="id81" draw:style-name="a830" draw:name="Content Placeholder 2" svg:x="6.66667in" svg:y="1.46123in" svg:width="6.66667in" svg:height="6.03877in">
          <draw:text-box>
            <text:list text:style-name="a799">
              <text:list-item>
                <text:p text:style-name="a798" text:class-names="" text:cond-style-name=""><text:span text:style-name="a791" text:class-names="">Installing<text:s text:c="1"/></text:span><text:span text:style-name="a792" text:class-names="">vsftpd</text:span><text:span text:style-name="a793" text:class-names=""><text:s text:c="1"/></text:span><text:span text:style-name="a794" text:class-names="">–<text:s text:c="1"/></text:span><text:span text:style-name="a795" text:class-names="">vsftpd</text:span><text:span text:style-name="a796" text:class-names=""><text:s text:c="1"/>is a File Transfer Protocol (FTP) server, which is used for downloading files between computers.</text:span><text:span text:style-name="a797" text:class-names=""/></text:p>
              </text:list-item>
            </text:list>
            <text:list text:style-name="a808">
              <text:list-item>
                <text:p text:style-name="a807" text:class-names="" text:cond-style-name=""><text:span text:style-name="a800" text:class-names="">Vsftpd</text:span><text:span text:style-name="a801" text:class-names=""><text:s text:c="1"/>looks for the file path<text:s text:c="1"/></text:span><text:span text:style-name="a802" text:class-names="">/etc/</text:span><text:span text:style-name="a803" text:class-names="">vsftpd.conf</text:span><text:span text:style-name="a804" text:class-names=""><text:s text:c="1"/>which configures the behaviour of<text:s text:c="1"/></text:span><text:span text:style-name="a805" text:class-names="">vsftpd</text:span><text:span text:style-name="a806" text:class-names=""><text:s text:c="1"/>(vsftpd.beasts.org, n.d.).</text:span></text:p>
              </text:list-item>
            </text:list>
            <text:list text:style-name="a815">
              <text:list-item>
                <text:p text:style-name="a814" text:class-names="" text:cond-style-name=""><text:span text:style-name="a809" text:class-names="">The<text:s text:c="1"/></text:span><text:span text:style-name="a810" text:class-names="">main focus</text:span><text:span text:style-name="a811" text:class-names=""><text:s text:c="1"/>of the<text:s text:c="1"/></text:span><text:span text:style-name="a812" text:class-names="">vstfpd.conf</text:span><text:span text:style-name="a813" text:class-names=""><text:s text:c="1"/>is:</text:span></text:p>
              </text:list-item>
            </text:list>
            <text:list text:style-name="a820">
              <text:list-item>
                <text:list text:style-name="a820">
                  <text:list-item>
                    <text:p text:style-name="a819" text:class-names="" text:cond-style-name=""><text:span text:style-name="a816" text:class-names="">anonymous_enable</text:span><text:span text:style-name="a817" text:class-names="">=YES</text:span><text:span text:style-name="a818" text:class-names=""><text:s text:c="1"/>– allows anonymous access to the FTP server. Makes it impossible to identify who has accessed it and what activities were performed. Not knowing any information about the attacker makes things more unpredictable to know how/when they’ll return for another attack.</text:span></text:p>
                  </text:list-item>
                </text:list>
              </text:list-item>
            </text:list>
            <text:list text:style-name="a829">
              <text:list-item>
                <text:p text:style-name="a828" text:class-names="" text:cond-style-name=""><text:span text:style-name="a821" text:class-names="">Firewall was<text:s text:c="1"/></text:span><text:span text:style-name="a822" text:class-names="">disabled</text:span><text:span text:style-name="a823" text:class-names="">,</text:span><text:span text:style-name="a824" text:class-names=""><text:s text:c="1"/>therefore there’s no tool to protect against<text:s text:c="1"/></text:span><text:span text:style-name="a825" text:class-names="">un</text:span><text:span text:style-name="a826" text:class-names="">authorised<text:s text:c="1"/></text:span><text:span text:style-name="a827" text:class-names="">use and identify malicious behaviour, which would provide a great layer of security,</text:span></text:p>
              </text:list-item>
            </text:list>
          </draw:text-box>
          <svg:title/>
          <svg:desc/>
        </draw:frame>
        <draw:frame draw:id="id82" draw:style-name="a831" draw:name="Picture 7" svg:x="-0.00001in" svg:y="0.70027in" svg:width="6.66666in" svg:height="0.76096in" style:rel-width="scale" style:rel-height="scale">
          <draw:image xlink:href="media/image3.png" xlink:type="simple" xlink:show="embed" xlink:actuate="onLoad"/>
          <svg:title/>
          <svg:desc/>
        </draw:frame>
        <draw:frame draw:id="id83" draw:style-name="a832" draw:name="Picture 8" svg:x="0in" svg:y="2.22809in" svg:width="6.66666in" svg:height="1.91092in" style:rel-width="scale" style:rel-height="scale">
          <draw:image xlink:href="media/image4.png" xlink:type="simple" xlink:show="embed" xlink:actuate="onLoad"/>
          <svg:title/>
          <svg:desc/>
        </draw:frame>
        <draw:frame draw:id="id84" draw:style-name="a839" draw:name="TextBox 4" svg:x="-0.00001in" svg:y="1.47441in" svg:width="6.66667in" svg:height="0.37025in">
          <draw:text-box>
            <text:p text:style-name="a838" text:class-names="" text:cond-style-name=""><text:span text:style-name="a833" text:class-names="">Figure<text:s text:c="1"/></text:span><text:span text:style-name="a834" text:class-names="">1</text:span><text:span text:style-name="a835" text:class-names="">:<text:s text:c="1"/></text:span><text:span text:style-name="a836" text:class-names="">Installation of vsftpd</text:span><text:span text:style-name="a837" text:class-names=""/></text:p>
          </draw:text-box>
          <svg:title/>
          <svg:desc/>
        </draw:frame>
        <draw:frame draw:id="id85" draw:style-name="a846" draw:name="TextBox 4" svg:x="-0.00001in" svg:y="4.14661in" svg:width="6.66667in" svg:height="0.37025in">
          <draw:text-box>
            <text:p text:style-name="a845" text:class-names="" text:cond-style-name=""><text:span text:style-name="a840" text:class-names="">Figure<text:s text:c="1"/></text:span><text:span text:style-name="a841" text:class-names="">2</text:span><text:span text:style-name="a842" text:class-names="">:<text:s text:c="1"/></text:span><text:span text:style-name="a843" text:class-names="">Settings of vsftpd within /etc/vsftpd.conf</text:span><text:span text:style-name="a844" text:class-names=""/></text:p>
          </draw:text-box>
          <svg:title/>
          <svg:desc/>
        </draw:frame>
        <draw:frame draw:id="id86" draw:style-name="a847" draw:name="Picture 12" svg:x="0in" svg:y="5.03788in" svg:width="6.66666in" svg:height="0.59722in" style:rel-width="scale" style:rel-height="scale">
          <draw:image xlink:href="media/image5.png" xlink:type="simple" xlink:show="embed" xlink:actuate="onLoad"/>
          <svg:title/>
          <svg:desc/>
        </draw:frame>
        <draw:frame draw:id="id87" draw:style-name="a854" draw:name="TextBox 4" svg:x="-0.00002in" svg:y="5.65534in" svg:width="6.66667in" svg:height="0.37025in">
          <draw:text-box>
            <text:p text:style-name="a853" text:class-names="" text:cond-style-name=""><text:span text:style-name="a848" text:class-names="">Figure<text:s text:c="1"/></text:span><text:span text:style-name="a849" text:class-names="">3</text:span><text:span text:style-name="a850" text:class-names="">:<text:s text:c="1"/></text:span><text:span text:style-name="a851" text:class-names="">Firewall Disabled</text:span><text:span text:style-name="a852" text:class-names=""/></text:p>
          </draw:text-box>
          <svg:title/>
          <svg:desc/>
        </draw:frame>
      </draw:page>
      <draw:page draw:name="Slide21" draw:style-name="a855" draw:master-page-name="Master1-Layout2-obj-Title-and-Content" presentation:presentation-page-layout-name="Master1-PPL2" draw:id="Slide-276">
        <draw:frame draw:id="id88" presentation:style-name="a859" draw:name="Title 1" svg:x="6.66667in" svg:y="0in" svg:width="6.66667in" svg:height="1.46123in" presentation:class="title" presentation:placeholder="false">
          <draw:text-box>
            <text:p text:style-name="a858" text:class-names="" text:cond-style-name=""><text:span text:style-name="a856" text:class-names="">Linux Exploitation Process</text:span><text:span text:style-name="a857" text:class-names=""/></text:p>
          </draw:text-box>
          <svg:title/>
          <svg:desc/>
        </draw:frame>
        <draw:frame draw:id="id89" draw:style-name="a885" draw:name="Content Placeholder 2" svg:x="6.66667in" svg:y="1.46123in" svg:width="6.66667in" svg:height="6.03877in">
          <draw:text-box>
            <text:list text:style-name="a863">
              <text:list-item>
                <text:p text:style-name="a862" text:class-names="" text:cond-style-name=""><text:span text:style-name="a860" text:class-names="">Nmap</text:span><text:span text:style-name="a861" text:class-names=""><text:s text:c="1"/>is an open-source tool for network scanning &amp; exploration. In this case, it was used to identify the vsftpd server on Port 21.</text:span></text:p>
              </text:list-item>
            </text:list>
            <text:list text:style-name="a866">
              <text:list-item>
                <text:p text:style-name="a865" text:class-names="" text:cond-style-name=""><text:span text:style-name="a864" text:class-names="">It managed to do this because there is no firewall, meaning the port is left open to the public. Without a firewall, anyone can access the FTP server and view what files and contents are stored by the organisation.</text:span></text:p>
              </text:list-item>
            </text:list>
            <text:list text:style-name="a873">
              <text:list-item>
                <text:p text:style-name="a872" text:class-names="" text:cond-style-name=""><text:span text:style-name="a867" text:class-names="">In Figure 5, after trying to enter the FTP server by entering<text:s text:c="1"/></text:span><text:span text:style-name="a868" text:class-names="">“ftp {IP address}”,<text:s text:c="1"/></text:span><text:span text:style-name="a869" text:class-names="">the attacker enters the username<text:s text:c="1"/></text:span><text:span text:style-name="a870" text:class-names="">“anonymous”</text:span><text:span text:style-name="a871" text:class-names="">. They have now entered the server very easily without any identification of their identity.</text:span></text:p>
              </text:list-item>
            </text:list>
            <text:list text:style-name="a878">
              <text:list-item>
                <text:p text:style-name="a877" text:class-names="" text:cond-style-name=""><text:span text:style-name="a874" text:class-names="">In Figure 6, the attacker can view the list of folders that belong to the organisation. He then found a file named<text:s text:c="1"/></text:span><text:span text:style-name="a875" text:class-names="">employee_records.txt</text:span><text:span text:style-name="a876" text:class-names=""><text:s text:c="1"/>inside the HR folder.<text:s text:c="1"/></text:span></text:p>
              </text:list-item>
            </text:list>
            <text:list text:style-name="a881">
              <text:list-item>
                <text:p text:style-name="a880" text:class-names="" text:cond-style-name=""><text:span text:style-name="a879" text:class-names="">This discovery reveals the organisation’s file structure, which an attacker can use for future attacks.</text:span></text:p>
              </text:list-item>
            </text:list>
            <text:list text:style-name="a884">
              <text:list-item>
                <text:p text:style-name="a883" text:class-names="" text:cond-style-name=""><text:span text:style-name="a882" text:class-names=""/></text:p>
              </text:list-item>
            </text:list>
          </draw:text-box>
          <svg:title/>
          <svg:desc/>
        </draw:frame>
        <draw:frame draw:id="id90" draw:style-name="a886" draw:name="Picture 7" svg:x="0in" svg:y="0in" svg:width="6.66666in" svg:height="1.58464in" style:rel-width="scale" style:rel-height="scale">
          <draw:image xlink:href="media/image6.png" xlink:type="simple" xlink:show="embed" xlink:actuate="onLoad"/>
          <svg:title/>
          <svg:desc/>
        </draw:frame>
        <draw:frame draw:id="id91" draw:style-name="a887" draw:name="Picture 8" svg:x="0in" svg:y="2.12083in" svg:width="5.66667in" svg:height="1.38546in" style:rel-width="scale" style:rel-height="scale">
          <draw:image xlink:href="media/image7.png" xlink:type="simple" xlink:show="embed" xlink:actuate="onLoad"/>
          <svg:title/>
          <svg:desc/>
        </draw:frame>
        <draw:frame draw:id="id92" draw:style-name="a888" draw:name="Picture 10" svg:x="-0.00001in" svg:y="4.06897in" svg:width="4.90093in" svg:height="2.22043in" style:rel-width="scale" style:rel-height="scale">
          <draw:image xlink:href="media/image8.png" xlink:type="simple" xlink:show="embed" xlink:actuate="onLoad"/>
          <svg:title/>
          <svg:desc/>
        </draw:frame>
        <draw:frame draw:id="id93" draw:style-name="a889" draw:name="Picture 12" svg:x="0in" svg:y="6.28939in" svg:width="4.90093in" svg:height="0.86149in" style:rel-width="scale" style:rel-height="scale">
          <draw:image xlink:href="media/image9.png" xlink:type="simple" xlink:show="embed" xlink:actuate="onLoad"/>
          <svg:title/>
          <svg:desc/>
        </draw:frame>
        <draw:frame draw:id="id94" draw:style-name="a896" draw:name="TextBox 4" svg:x="-0.00001in" svg:y="1.58464in" svg:width="6.66667in" svg:height="0.37025in">
          <draw:text-box>
            <text:p text:style-name="a895" text:class-names="" text:cond-style-name=""><text:span text:style-name="a890" text:class-names="">Figure<text:s text:c="1"/></text:span><text:span text:style-name="a891" text:class-names="">4</text:span><text:span text:style-name="a892" text:class-names="">:<text:s text:c="1"/></text:span><text:span text:style-name="a893" text:class-names="">nmap scanning for open ports</text:span><text:span text:style-name="a894" text:class-names=""/></text:p>
          </draw:text-box>
          <svg:title/>
          <svg:desc/>
        </draw:frame>
        <draw:custom-shape svg:x="2.7449in" svg:y="0in" svg:width="1.23469in" svg:height="0.16327in" draw:id="id95" draw:style-name="a899" draw:name="Rectangle 16">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custom-shape svg:x="3.63963in" svg:y="2.12372in" svg:width="2.02703in" svg:height="0.25997in" draw:id="id96" draw:style-name="a902" draw:name="Rectangle 17">
          <svg:title/>
          <svg:desc/>
          <text:p text:style-name="a901" text:class-names="" text:cond-style-name=""><text:span text:style-name="a900" text:class-names=""/></text:p>
          <draw:enhanced-geometry xmlns:dr3d="urn:oasis:names:tc:opendocument:xmlns:dr3d:1.0" draw:type="non-primitive" svg:viewBox="0 0 21600 21600" draw:enhanced-path="M 0 0 L 21600 0 21600 21600 0 21600 Z N"/>
        </draw:custom-shape>
        <draw:custom-shape svg:x="1.6126in" svg:y="2.43063in" svg:width="1.8874in" svg:height="0.25997in" draw:id="id97" draw:style-name="a905" draw:name="Rectangle 18">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custom-shape>
        <draw:custom-shape svg:x="0.76906in" svg:y="2.95497in" svg:width="1.8874in" svg:height="0.25997in" draw:id="id98" draw:style-name="a908" draw:name="Rectangle 19">
          <svg:title/>
          <svg:desc/>
          <text:p text:style-name="a907" text:class-names="" text:cond-style-name=""><text:span text:style-name="a906" text:class-names=""/></text:p>
          <draw:enhanced-geometry xmlns:dr3d="urn:oasis:names:tc:opendocument:xmlns:dr3d:1.0" draw:type="non-primitive" svg:viewBox="0 0 21600 21600" draw:enhanced-path="M 0 0 L 21600 0 21600 21600 0 21600 Z N"/>
        </draw:custom-shape>
        <draw:custom-shape svg:x="2.19388in" svg:y="0.34911in" svg:width="1.44575in" svg:height="0.16327in" draw:id="id99" draw:style-name="a911" draw:name="Rectangle 20">
          <svg:title/>
          <svg:desc/>
          <text:p text:style-name="a910" text:class-names="" text:cond-style-name=""><text:span text:style-name="a909" text:class-names=""/></text:p>
          <draw:enhanced-geometry xmlns:dr3d="urn:oasis:names:tc:opendocument:xmlns:dr3d:1.0" draw:type="non-primitive" svg:viewBox="0 0 21600 21600" draw:enhanced-path="M 0 0 L 21600 0 21600 21600 0 21600 Z N"/>
        </draw:custom-shape>
        <draw:frame draw:id="id100" draw:style-name="a918" draw:name="TextBox 4" svg:x="0in" svg:y="3.50629in" svg:width="5.66667in" svg:height="0.37025in">
          <draw:text-box>
            <text:p text:style-name="a917" text:class-names="" text:cond-style-name=""><text:span text:style-name="a912" text:class-names="">Figure<text:s text:c="1"/></text:span><text:span text:style-name="a913" text:class-names="">5</text:span><text:span text:style-name="a914" text:class-names="">:<text:s text:c="1"/></text:span><text:span text:style-name="a915" text:class-names="">Successful anonymous access to FTP server</text:span><text:span text:style-name="a916" text:class-names=""/></text:p>
          </draw:text-box>
          <svg:title/>
          <svg:desc/>
        </draw:frame>
        <draw:frame draw:id="id101" draw:style-name="a925" draw:name="TextBox 4" svg:x="4.90093in" svg:y="4.89175in" svg:width="1.76574in" svg:height="1.7166in">
          <draw:text-box>
            <text:p text:style-name="a924" text:class-names="" text:cond-style-name=""><text:span text:style-name="a919" text:class-names="">Figure<text:s text:c="1"/></text:span><text:span text:style-name="a920" text:class-names="">6</text:span><text:span text:style-name="a921" text:class-names="">:<text:s text:c="1"/></text:span><text:span text:style-name="a922" text:class-names="">Attacker obtains file paths and name of files in HR folder</text:span><text:span text:style-name="a923" text:class-names=""/></text:p>
          </draw:text-box>
          <svg:title/>
          <svg:desc/>
        </draw:frame>
      </draw:page>
      <draw:page draw:name="Slide9" draw:style-name="a926" draw:master-page-name="Master1-Layout2-obj-Title-and-Content" presentation:presentation-page-layout-name="Master1-PPL2" draw:id="Slide-264">
        <draw:frame draw:id="id102" draw:style-name="a930" draw:name="Title 1" svg:x="6.66667in" svg:y="0in" svg:width="6.66667in" svg:height="1.46123in">
          <draw:text-box>
            <text:p text:style-name="a929" text:class-names="" text:cond-style-name=""><text:span text:style-name="a927" text:class-names="">Solutions for preventing exploitation: Enforcing access control policies in Ubuntu</text:span><text:span text:style-name="a928" text:class-names=""/></text:p>
          </draw:text-box>
          <svg:title/>
          <svg:desc/>
        </draw:frame>
        <draw:frame draw:id="id103" draw:style-name="a974" draw:name="Content Placeholder 2" svg:x="6.66667in" svg:y="1.46123in" svg:width="6.66667in" svg:height="6.03877in">
          <draw:text-box>
            <text:list text:style-name="a935">
              <text:list-item>
                <text:p text:style-name="a934" text:class-names="" text:cond-style-name=""><text:span text:style-name="a931" text:class-names="">Changed<text:s text:c="1"/></text:span><text:span text:style-name="a932" text:class-names="">anonymous_enable</text:span><text:span text:style-name="a933" text:class-names=""><text:s text:c="1"/>to No, which prevents them from having unauthorised access to the FTP port ever again.</text:span></text:p>
              </text:list-item>
            </text:list>
            <text:list text:style-name="a946">
              <text:list-item>
                <text:p text:style-name="a945" text:class-names="" text:cond-style-name=""><text:span text:style-name="a936" text:class-names="">Setting up the firewa</text:span><text:span text:style-name="a937" text:class-names="">ll in Ubuntu<text:s text:c="1"/></text:span><text:span text:style-name="a938" text:class-names="">OS</text:span><text:span text:style-name="a939" text:class-names=""><text:s text:c="1"/></text:span><text:span text:style-name="a940" text:class-names="">(Boucheron,<text:s text:c="1"/></text:span><text:span text:style-name="a941" text:class-names="">Camisso</text:span><text:span text:style-name="a942" text:class-names=""><text:s text:c="1"/>and Abid, 2024)</text:span><text:span text:style-name="a943" text:class-names="">:</text:span><text:span text:style-name="a944" text:class-names=""/></text:p>
              </text:list-item>
            </text:list>
            <text:list text:style-name="a955">
              <text:list-item>
                <text:list text:style-name="a955">
                  <text:list-item>
                    <text:p text:style-name="a954" text:class-names="" text:cond-style-name=""><text:span text:style-name="a947" text:class-names="">s</text:span><text:span text:style-name="a948" text:class-names="">udo</text:span><text:span text:style-name="a949" text:class-names=""><text:s text:c="1"/></text:span><text:span text:style-name="a950" text:class-names="">ufw</text:span><text:span text:style-name="a951" text:class-names=""><text:s text:c="1"/>default deny i</text:span><text:span text:style-name="a952" text:class-names="">ncoming</text:span><text:span text:style-name="a953" text:class-names=""><text:s text:c="1"/>– sets rule to block all incoming traffic</text:span></text:p>
                  </text:list-item>
                </text:list>
              </text:list-item>
            </text:list>
            <text:list text:style-name="a962">
              <text:list-item>
                <text:list text:style-name="a962">
                  <text:list-item>
                    <text:p text:style-name="a961" text:class-names="" text:cond-style-name=""><text:span text:style-name="a956" text:class-names="">sudo</text:span><text:span text:style-name="a957" text:class-names=""><text:s text:c="1"/></text:span><text:span text:style-name="a958" text:class-names="">ufw</text:span><text:span text:style-name="a959" text:class-names=""><text:s text:c="1"/>default deny outgoing</text:span><text:span text:style-name="a960" text:class-names=""><text:s text:c="1"/>– sets rule to allow outgoing traffic</text:span></text:p>
                  </text:list-item>
                </text:list>
              </text:list-item>
            </text:list>
            <text:list text:style-name="a970">
              <text:list-item>
                <text:list text:style-name="a970">
                  <text:list-item>
                    <text:p text:style-name="a969" text:class-names="" text:cond-style-name=""><text:span text:style-name="a963" text:class-names="">sudo</text:span><text:span text:style-name="a964" text:class-names=""><text:s text:c="1"/></text:span><text:span text:style-name="a965" text:class-names="">ufw</text:span><text:span text:style-name="a966" text:class-names=""><text:s text:c="1"/>enable –<text:s text:c="1"/></text:span><text:span text:style-name="a967" text:class-names="">enables firewall, meaning malicious activity can be detected, and a security layer within the organisation’s system is implemented.</text:span><text:span text:style-name="a968" text:class-names=""/></text:p>
                  </text:list-item>
                </text:list>
              </text:list-item>
            </text:list>
            <text:list text:style-name="a973">
              <text:list-item>
                <text:list text:style-name="a973">
                  <text:list-item>
                    <text:p text:style-name="a972" text:class-names="" text:cond-style-name=""><text:span text:style-name="a971" text:class-names=""/></text:p>
                  </text:list-item>
                </text:list>
              </text:list-item>
            </text:list>
          </draw:text-box>
          <svg:title/>
          <svg:desc/>
        </draw:frame>
        <draw:frame draw:id="id104" draw:style-name="a975" draw:name="Picture 7" svg:x="0in" svg:y="0in" svg:width="6.66666in" svg:height="2.15644in" style:rel-width="scale" style:rel-height="scale">
          <draw:image xlink:href="media/image10.png" xlink:type="simple" xlink:show="embed" xlink:actuate="onLoad"/>
          <svg:title/>
          <svg:desc/>
        </draw:frame>
        <draw:frame draw:id="id105" draw:style-name="a976" draw:name="Picture 11" svg:x="0in" svg:y="3.1176in" svg:width="6.66667in" svg:height="1.83512in" style:rel-width="scale" style:rel-height="scale">
          <draw:image xlink:href="media/image11.png" xlink:type="simple" xlink:show="embed" xlink:actuate="onLoad"/>
          <svg:title/>
          <svg:desc/>
        </draw:frame>
        <draw:frame draw:id="id106" draw:style-name="a983" draw:name="TextBox 4" svg:x="-0.00001in" svg:y="2.17666in" svg:width="6.66667in" svg:height="0.37025in">
          <draw:text-box>
            <text:p text:style-name="a982" text:class-names="" text:cond-style-name=""><text:span text:style-name="a977" text:class-names="">Figure<text:s text:c="1"/></text:span><text:span text:style-name="a978" text:class-names="">7</text:span><text:span text:style-name="a979" text:class-names="">:<text:s text:c="1"/></text:span><text:span text:style-name="a980" text:class-names="">anonymous_enable is now set to NO in vsftpd.conf</text:span><text:span text:style-name="a981" text:class-names=""/></text:p>
          </draw:text-box>
          <svg:title/>
          <svg:desc/>
        </draw:frame>
        <draw:frame draw:id="id107" draw:style-name="a989" draw:name="TextBox 4" svg:x="-0.00001in" svg:y="5.57994in" svg:width="6.66667in" svg:height="0.37025in">
          <draw:text-box>
            <text:p text:style-name="a988" text:class-names="" text:cond-style-name=""><text:span text:style-name="a984" text:class-names="">Figure<text:s text:c="1"/></text:span><text:span text:style-name="a985" text:class-names="">8</text:span><text:span text:style-name="a986" text:class-names="">:<text:s text:c="1"/></text:span><text:span text:style-name="a987" text:class-names="">Enabling the firewall</text:span></text:p>
          </draw:text-box>
          <svg:title/>
          <svg:desc/>
        </draw:frame>
        <draw:frame draw:id="id108" draw:style-name="a990" draw:name="Picture 11" svg:x="0in" svg:y="4.95271in" svg:width="6.66667in" svg:height="0.62723in" style:rel-width="scale" style:rel-height="scale">
          <draw:image xlink:href="media/image11.png" xlink:type="simple" xlink:show="embed" xlink:actuate="onLoad"/>
          <svg:title/>
          <svg:desc/>
        </draw:frame>
        <presentation:notes draw:style-name="a996">
          <draw:page-thumbnail draw:page-number="6" svg:x="0.75in" svg:y="1.25in" svg:width="6in" svg:height="3.375in" presentation:class="page" draw:id="id109" presentation:style-name="a991" draw:name="Slide Image Placeholder 1">
            <svg:title/>
            <svg:desc/>
          </draw:page-thumbnail>
          <draw:frame draw:id="id110" presentation:style-name="a992" draw:name="Notes Placeholder 2" svg:x="0.75in" svg:y="4.8125in" svg:width="6in" svg:height="3.9375in" presentation:class="notes" presentation:placeholder="true">
            <draw:text-box/>
            <svg:title/>
            <svg:desc/>
          </draw:frame>
          <draw:frame draw:id="id111" draw:style-name="a995" draw:name="Slide Number Placeholder 3" svg:x="4.24826in" svg:y="9.49826in" svg:width="3.25in" svg:height="0.50174in">
            <draw:text-box>
              <text:p text:style-name="a994" text:class-names="" text:cond-style-name=""><text:span text:style-name="a993" text:class-names=""><text:page-number style:num-format="1" text:fixed="false"/></text:span></text:p>
            </draw:text-box>
            <svg:title/>
            <svg:desc/>
          </draw:frame>
        </presentation:notes>
      </draw:page>
      <draw:page draw:name="Slide15" draw:style-name="a997" draw:master-page-name="Master1-Layout2-obj-Title-and-Content" presentation:presentation-page-layout-name="Master1-PPL2" draw:id="Slide-270">
        <draw:frame draw:id="id112" presentation:style-name="a1021" draw:name="Content Placeholder 2" svg:x="6.66667in" svg:y="1.45614in" svg:width="6.66667in" svg:height="6.04386in" presentation:class="outline" presentation:placeholder="false">
          <draw:text-box>
            <text:list text:style-name="a1000">
              <text:list-item>
                <text:p text:style-name="a999" text:class-names="" text:cond-style-name=""><text:span text:style-name="a998" text:class-names="">Amazon Relational Database Service (RDS) is a web service where AWS users can set up, operate and scale a relational database.</text:span></text:p>
              </text:list-item>
            </text:list>
            <text:list text:style-name="a1005">
              <text:list-item>
                <text:p text:style-name="a1004" text:class-names="" text:cond-style-name=""><text:span text:style-name="a1001" text:class-names="">The organisation in this simulation has chosen to set up its own for the 1</text:span><text:span text:style-name="a1002" text:class-names="">st</text:span><text:span text:style-name="a1003" text:class-names=""><text:s text:c="1"/>time and is currently evaluating what to store in them. However, they have made a few tricky errors.</text:span></text:p>
              </text:list-item>
            </text:list>
            <text:list text:style-name="a1009">
              <text:list-item>
                <text:p text:style-name="a1008" text:class-names="" text:cond-style-name=""><text:span text:style-name="a1006" text:class-names="">Figure 9</text:span><text:span text:style-name="a1007" text:class-names=""><text:s text:c="1"/>– The port the database operates on is port 3306 and is currently open to 0.0.0.0/0. This allows any inbound Hypertext Transfer Protocol access from any IP address (Amazon.com, 2019). Allowing any sort of incoming traffic means there is no database restriction implemented to limit attempts to connect to it.</text:span></text:p>
              </text:list-item>
            </text:list>
            <text:list text:style-name="a1015">
              <text:list-item>
                <text:p text:style-name="a1014" text:class-names="" text:cond-style-name=""><text:span text:style-name="a1010" text:class-names="">Figure 10<text:s text:c="1"/></text:span><text:span text:style-name="a1011" text:class-names="">– There is no encryption enabled. Encryption protects data by scrambling it into a form that is only readable with a special key. If an attacker bypasses security, he can’t understand the data without the key. This benefit, however, isn’t playing out<text:s text:c="1"/></text:span><text:span text:style-name="a1012" text:class-names="">at the moment</text:span><text:span text:style-name="a1013" text:class-names="">.</text:span></text:p>
              </text:list-item>
            </text:list>
            <text:list text:style-name="a1020">
              <text:list-item>
                <text:p text:style-name="a1019" text:class-names="" text:cond-style-name=""><text:span text:style-name="a1016" text:class-names="">Figure 11</text:span><text:span text:style-name="a1017" text:class-names=""><text:s text:c="1"/>– Public Access is “Yes”. This would expose sensitive data that the organisation would implement to anyone on the internet.</text:span><text:span text:style-name="a1018" text:class-names=""/></text:p>
              </text:list-item>
            </text:list>
          </draw:text-box>
          <svg:title/>
          <svg:desc/>
        </draw:frame>
        <draw:frame draw:id="id113" presentation:style-name="a1025" draw:name="Title 1" svg:x="6.66667in" svg:y="0in" svg:width="6.66667in" svg:height="1.45614in" presentation:class="title" presentation:placeholder="false">
          <draw:text-box>
            <text:p text:style-name="a1024" text:class-names="" text:cond-style-name=""><text:span text:style-name="a1022" text:class-names="">Initial AWS Vulnerable Setup</text:span><text:span text:style-name="a1023" text:class-names=""/></text:p>
          </draw:text-box>
          <svg:title/>
          <svg:desc/>
        </draw:frame>
        <draw:frame draw:id="id114" draw:style-name="a1029" draw:name="TextBox 4" svg:x="0in" svg:y="1.96755in" svg:width="6.66667in" svg:height="0.37025in">
          <draw:text-box>
            <text:p text:style-name="a1028" text:class-names="" text:cond-style-name=""><text:span text:style-name="a1026" text:class-names="">Figure 9:<text:s text:c="1"/></text:span><text:span text:style-name="a1027" text:class-names="">Any inbound traffic is allowed due to the 0.0.0.0 rule</text:span></text:p>
          </draw:text-box>
          <svg:title/>
          <svg:desc/>
        </draw:frame>
        <draw:frame draw:id="id115" draw:style-name="a1030" draw:name="Picture 9" svg:x="0in" svg:y="0in" svg:width="6.66666in" svg:height="1.96756in" style:rel-width="scale" style:rel-height="scale">
          <draw:image xlink:href="media/image12.png" xlink:type="simple" xlink:show="embed" xlink:actuate="onLoad"/>
          <svg:title/>
          <svg:desc/>
        </draw:frame>
        <draw:frame draw:id="id116" draw:style-name="a1031" draw:name="Picture 11" svg:x="-0.00001in" svg:y="2.65169in" svg:width="6.66666in" svg:height="2.05917in" style:rel-width="scale" style:rel-height="scale">
          <draw:image xlink:href="media/image13.png" xlink:type="simple" xlink:show="embed" xlink:actuate="onLoad"/>
          <svg:title/>
          <svg:desc/>
        </draw:frame>
        <draw:frame draw:id="id117" draw:style-name="a1032" draw:name="Picture 13" svg:x="0in" svg:y="5.25in" svg:width="4.1411in" svg:height="2.23189in" style:rel-width="scale" style:rel-height="scale">
          <draw:image xlink:href="media/image14.png" xlink:type="simple" xlink:show="embed" xlink:actuate="onLoad"/>
          <svg:title/>
          <svg:desc/>
        </draw:frame>
        <draw:custom-shape svg:x="3.42105in" svg:y="4.10526in" svg:width="1.19583in" svg:height="0.54409in" draw:id="id118" draw:style-name="a1035" draw:name="Rectangle 14">
          <svg:title/>
          <svg:desc/>
          <text:p text:style-name="a1034" text:class-names="" text:cond-style-name=""><text:span text:style-name="a1033" text:class-names=""/></text:p>
          <draw:enhanced-geometry xmlns:dr3d="urn:oasis:names:tc:opendocument:xmlns:dr3d:1.0" draw:type="non-primitive" svg:viewBox="0 0 21600 21600" draw:enhanced-path="M 0 0 L 21600 0 21600 21600 0 21600 Z N"/>
        </draw:custom-shape>
        <draw:custom-shape svg:x="2.78571in" svg:y="6.7987in" svg:width="1.27922in" svg:height="0.46753in" draw:id="id119" draw:style-name="a1038" draw:name="Rectangle 15">
          <svg:title/>
          <svg:desc/>
          <text:p text:style-name="a1037" text:class-names="" text:cond-style-name=""><text:span text:style-name="a1036" text:class-names=""/></text:p>
          <draw:enhanced-geometry xmlns:dr3d="urn:oasis:names:tc:opendocument:xmlns:dr3d:1.0" draw:type="non-primitive" svg:viewBox="0 0 21600 21600" draw:enhanced-path="M 0 0 L 21600 0 21600 21600 0 21600 Z N"/>
        </draw:custom-shape>
        <draw:frame draw:id="id120" draw:style-name="a1042" draw:name="TextBox 4" svg:x="-0.00002in" svg:y="4.71086in" svg:width="6.66667in" svg:height="0.37025in">
          <draw:text-box>
            <text:p text:style-name="a1041" text:class-names="" text:cond-style-name=""><text:span text:style-name="a1039" text:class-names="">Figure 10:<text:s text:c="1"/></text:span><text:span text:style-name="a1040" text:class-names="">Encryption not being enabled</text:span></text:p>
          </draw:text-box>
          <svg:title/>
          <svg:desc/>
        </draw:frame>
        <draw:frame draw:id="id121" draw:style-name="a1046" draw:name="TextBox 4" svg:x="4.14111in" svg:y="5.91125in" svg:width="2.10889in" svg:height="0.90879in">
          <draw:text-box>
            <text:p text:style-name="a1045" text:class-names="" text:cond-style-name=""><text:span text:style-name="a1043" text:class-names="">Figure 10:<text:s text:c="1"/></text:span><text:span text:style-name="a1044" text:class-names="">Encryption not being enabled</text:span></text:p>
          </draw:text-box>
          <svg:title/>
          <svg:desc/>
        </draw:frame>
        <presentation:notes draw:style-name="a1052">
          <draw:page-thumbnail draw:page-number="7" svg:x="0.75in" svg:y="1.25in" svg:width="6in" svg:height="3.375in" presentation:class="page" draw:id="id122" presentation:style-name="a1047" draw:name="Slide Image Placeholder 1">
            <svg:title/>
            <svg:desc/>
          </draw:page-thumbnail>
          <draw:frame draw:id="id123" presentation:style-name="a1048" draw:name="Notes Placeholder 2" svg:x="0.75in" svg:y="4.8125in" svg:width="6in" svg:height="3.9375in" presentation:class="notes" presentation:placeholder="true">
            <draw:text-box/>
            <svg:title/>
            <svg:desc/>
          </draw:frame>
          <draw:frame draw:id="id124" draw:style-name="a1051" draw:name="Slide Number Placeholder 3" svg:x="4.24826in" svg:y="9.49826in" svg:width="3.25in" svg:height="0.50174in">
            <draw:text-box>
              <text:p text:style-name="a1050" text:class-names="" text:cond-style-name=""><text:span text:style-name="a1049" text:class-names=""><text:page-number style:num-format="1" text:fixed="false"/></text:span></text:p>
            </draw:text-box>
            <svg:title/>
            <svg:desc/>
          </draw:frame>
        </presentation:notes>
      </draw:page>
      <draw:page draw:name="Slide23" draw:style-name="a1053" draw:master-page-name="Master1-Layout2-obj-Title-and-Content" presentation:presentation-page-layout-name="Master1-PPL2" draw:id="Slide-278">
        <draw:frame draw:id="id125" draw:style-name="a1075" draw:name="Content Placeholder 2" svg:x="5.65215in" svg:y="1.37963in" svg:width="7.68119in" svg:height="6.12037in">
          <draw:text-box>
            <text:list text:style-name="a1057">
              <text:list-item>
                <text:p text:style-name="a1056" text:class-names="" text:cond-style-name=""><text:span text:style-name="a1054" text:class-names="">Restriction of Port 3306</text:span><text:span text:style-name="a1055" text:class-names=""><text:s text:c="1"/>– allow only employees of the organisation to be the inbound traffic to their organisation’s database to connect to it, so attackers can’t try to access database.</text:span></text:p>
              </text:list-item>
            </text:list>
            <text:list text:style-name="a1061">
              <text:list-item>
                <text:p text:style-name="a1060" text:class-names="" text:cond-style-name=""><text:span text:style-name="a1058" text:class-names="">Encryption via a snapshot</text:span><text:span text:style-name="a1059" text:class-names=""><text:s text:c="1"/>– Create a snapshot in the “Snapshots” section of RDS and then copy it to enable Encryption.</text:span></text:p>
              </text:list-item>
            </text:list>
            <text:list text:style-name="a1064">
              <text:list-item>
                <text:list text:style-name="a1064">
                  <text:list-item>
                    <text:p text:style-name="a1063" text:class-names="" text:cond-style-name=""><text:span text:style-name="a1062" text:class-names="">The final step is to restore the RDS instance from the encrypted snapshot to get an encrypted copy of the original database instance (Amazon.com, 2026).</text:span></text:p>
                  </text:list-item>
                </text:list>
              </text:list-item>
            </text:list>
            <text:list text:style-name="a1067">
              <text:list-item>
                <text:list text:style-name="a1067">
                  <text:list-item>
                    <text:p text:style-name="a1066" text:class-names="" text:cond-style-name=""><text:span text:style-name="a1065" text:class-names="">This wasn’t performed as AWS does charge you for this. (I had to learn this the very hard way, left the instance on and paid £900+)</text:span></text:p>
                  </text:list-item>
                </text:list>
              </text:list-item>
            </text:list>
            <text:list text:style-name="a1070">
              <text:list-item>
                <text:list text:style-name="a1070">
                  <text:list-item>
                    <text:p text:style-name="a1069" text:class-names="" text:cond-style-name=""><text:span text:style-name="a1068" text:class-names="">This is because I didn’t shut the RDS down; make sure you shut it down when not used to save money.</text:span></text:p>
                  </text:list-item>
                </text:list>
              </text:list-item>
            </text:list>
            <text:list text:style-name="a1074">
              <text:list-item>
                <text:p text:style-name="a1073" text:class-names="" text:cond-style-name=""><text:span text:style-name="a1071" text:class-names="">Disabled Public Accessibility</text:span><text:span text:style-name="a1072" text:class-names=""><text:s text:c="1"/>– Change it from a Yes to a No. Makes the RDS private within the organisation’s AWS server itself and isolates it from the public internet.</text:span></text:p>
              </text:list-item>
            </text:list>
          </draw:text-box>
          <svg:title/>
          <svg:desc/>
        </draw:frame>
        <draw:frame draw:id="id126" draw:style-name="a1076" draw:name="Picture 9" svg:x="0in" svg:y="0in" svg:width="5.65216in" svg:height="1.51304in" style:rel-width="scale" style:rel-height="scale">
          <draw:image xlink:href="media/image15.png" xlink:type="simple" xlink:show="embed" xlink:actuate="onLoad"/>
          <svg:title/>
          <svg:desc/>
        </draw:frame>
        <draw:frame draw:id="id127" draw:style-name="a1080" draw:name="TextBox 4" svg:x="-0.00001in" svg:y="1.51781in" svg:width="5.65216in" svg:height="0.63952in">
          <draw:text-box>
            <text:p text:style-name="a1079" text:class-names="" text:cond-style-name=""><text:span text:style-name="a1077" text:class-names="">Figure 12:<text:s text:c="1"/></text:span><text:span text:style-name="a1078" text:class-names="">Inbound traffic is now limited to authorised users</text:span></text:p>
          </draw:text-box>
          <svg:title/>
          <svg:desc/>
        </draw:frame>
        <draw:custom-shape svg:x="4.28441in" svg:y="0.96319in" svg:width="1.04559in" svg:height="0.20211in" draw:id="id128" draw:style-name="a1083" draw:name="Rectangle 11">
          <svg:title/>
          <svg:desc/>
          <text:p text:style-name="a1082" text:class-names="" text:cond-style-name=""><text:span text:style-name="a1081" text:class-names=""/></text:p>
          <draw:enhanced-geometry xmlns:dr3d="urn:oasis:names:tc:opendocument:xmlns:dr3d:1.0" draw:type="non-primitive" svg:viewBox="0 0 21600 21600" draw:enhanced-path="M 0 0 L 21600 0 21600 21600 0 21600 Z N"/>
        </draw:custom-shape>
        <draw:frame draw:id="id129" draw:style-name="a1084" draw:name="Picture 13" svg:x="0in" svg:y="4.69455in" svg:width="5.65218in" svg:height="1.64014in" style:rel-width="scale" style:rel-height="scale">
          <draw:image xlink:href="media/image16.png" xlink:type="simple" xlink:show="embed" xlink:actuate="onLoad"/>
          <svg:title/>
          <svg:desc/>
        </draw:frame>
        <draw:frame draw:id="id130" draw:style-name="a1088" draw:name="TextBox 4" svg:x="-0.00001in" svg:y="6.43612in" svg:width="5.65218in" svg:height="0.63952in">
          <draw:text-box>
            <text:p text:style-name="a1087" text:class-names="" text:cond-style-name=""><text:span text:style-name="a1085" text:class-names="">Figure 14:<text:s text:c="1"/></text:span><text:span text:style-name="a1086" text:class-names="">Reversing the implementation of public access of the relational database</text:span></text:p>
          </draw:text-box>
          <svg:title/>
          <svg:desc/>
        </draw:frame>
        <draw:frame draw:id="id131" draw:style-name="a1089" draw:name="Picture 18" svg:x="0in" svg:y="2.43114in" svg:width="5.65217in" svg:height="1.51338in" style:rel-width="scale" style:rel-height="scale">
          <draw:image xlink:href="media/image17.png" xlink:type="simple" xlink:show="embed" xlink:actuate="onLoad"/>
          <svg:title/>
          <svg:desc/>
        </draw:frame>
        <draw:frame draw:id="id132" draw:style-name="a1093" draw:name="TextBox 4" svg:x="-0.00001in" svg:y="3.84029in" svg:width="5.65217in" svg:height="0.37025in">
          <draw:text-box>
            <text:p text:style-name="a1092" text:class-names="" text:cond-style-name=""><text:span text:style-name="a1090" text:class-names="">Figure 13:<text:s text:c="1"/></text:span><text:span text:style-name="a1091" text:class-names="">Adding encrypted snapshot</text:span></text:p>
          </draw:text-box>
          <svg:title/>
          <svg:desc/>
        </draw:frame>
        <draw:frame draw:id="id133" presentation:style-name="a1097" draw:name="Title 1" svg:x="5.65215in" svg:y="0in" svg:width="7.68119in" svg:height="1.45614in" presentation:class="title" presentation:placeholder="false">
          <draw:text-box>
            <text:p text:style-name="a1096" text:class-names="" text:cond-style-name=""><text:span text:style-name="a1094" text:class-names="">Solutions to fix the AWS vulnerabilities</text:span><text:span text:style-name="a1095" text:class-names=""/></text:p>
          </draw:text-box>
          <svg:title/>
          <svg:desc/>
        </draw:frame>
        <presentation:notes draw:style-name="a1103">
          <draw:page-thumbnail draw:page-number="8" svg:x="0.75in" svg:y="1.25in" svg:width="6in" svg:height="3.375in" presentation:class="page" draw:id="id134" presentation:style-name="a1098" draw:name="Slide Image Placeholder 1">
            <svg:title/>
            <svg:desc/>
          </draw:page-thumbnail>
          <draw:frame draw:id="id135" presentation:style-name="a1099" draw:name="Notes Placeholder 2" svg:x="0.75in" svg:y="4.8125in" svg:width="6in" svg:height="3.9375in" presentation:class="notes" presentation:placeholder="true">
            <draw:text-box/>
            <svg:title/>
            <svg:desc/>
          </draw:frame>
          <draw:frame draw:id="id136" draw:style-name="a1102" draw:name="Slide Number Placeholder 3" svg:x="4.24826in" svg:y="9.49826in" svg:width="3.25in" svg:height="0.50174in">
            <draw:text-box>
              <text:p text:style-name="a1101" text:class-names="" text:cond-style-name=""><text:span text:style-name="a1100" text:class-names=""><text:page-number style:num-format="1" text:fixed="false"/></text:span></text:p>
            </draw:text-box>
            <svg:title/>
            <svg:desc/>
          </draw:frame>
        </presentation:notes>
      </draw:page>
      <draw:page draw:name="Slide12" draw:style-name="a1104" draw:master-page-name="Master1-Layout2-obj-Title-and-Content" presentation:presentation-page-layout-name="Master1-PPL2" draw:id="Slide-267">
        <draw:frame draw:id="id137" presentation:style-name="a1108" draw:name="Title 1" svg:x="0.91667in" svg:y="0.39931in" svg:width="11.5in" svg:height="1.44965in" presentation:class="title" presentation:placeholder="false">
          <draw:text-box>
            <text:p text:style-name="a1107" text:class-names="" text:cond-style-name=""><text:span text:style-name="a1105" text:class-names="">Summary</text:span><text:span text:style-name="a1106" text:class-names=""/></text:p>
          </draw:text-box>
          <svg:title/>
          <svg:desc/>
        </draw:frame>
        <draw:frame draw:id="id138" presentation:style-name="a1124" draw:name="Content Placeholder 2" svg:x="0.69517in" svg:y="1.99653in" svg:width="11.94299in" svg:height="5.10416in" presentation:class="outline" presentation:placeholder="false">
          <draw:text-box>
            <text:list text:style-name="a1111">
              <text:list-item>
                <text:p text:style-name="a1110" text:class-names="" text:cond-style-name=""><text:span text:style-name="a1109" text:class-names="">Network security is the protection of computer networks from internal and external cyberattacks</text:span></text:p>
              </text:list-item>
            </text:list>
            <text:list text:style-name="a1114">
              <text:list-item>
                <text:p text:style-name="a1113" text:class-names="" text:cond-style-name=""><text:span text:style-name="a1112" text:class-names="">Its aims are to prevent unauthorised access to resources, detect and stop cyberattacks and ensure authorised users have the access they should have.</text:span></text:p>
              </text:list-item>
            </text:list>
            <text:list text:style-name="a1117">
              <text:list-item>
                <text:p text:style-name="a1116" text:class-names="" text:cond-style-name=""><text:span text:style-name="a1115" text:class-names="">In both Ubuntu and AWS, we discovered what happens when there are no inbound restrictions to access a network. It allows public users to access confidential data they shouldn’t have.</text:span></text:p>
              </text:list-item>
            </text:list>
            <text:list text:style-name="a1120">
              <text:list-item>
                <text:p text:style-name="a1119" text:class-names="" text:cond-style-name=""><text:span text:style-name="a1118" text:class-names="">Data of your own business must be kept private from the rest of the public, else negative consequences can occur, such as data modification and data leaks.</text:span></text:p>
              </text:list-item>
            </text:list>
            <text:list text:style-name="a1123">
              <text:list-item>
                <text:p text:style-name="a1122" text:class-names="" text:cond-style-name=""><text:span text:style-name="a1121" text:class-names="">To prevent this, implement firewalls and inbound restrictions that only allow authorised users to connect to your and their resources.</text:span></text:p>
              </text:list-item>
            </text:list>
          </draw:text-box>
          <svg:title/>
          <svg:desc/>
        </draw:frame>
      </draw:page>
      <draw:page draw:name="Slide14" draw:style-name="a1125" draw:master-page-name="Master1-Layout2-obj-Title-and-Content" presentation:presentation-page-layout-name="Master1-PPL2" draw:id="Slide-269">
        <draw:frame draw:id="id139" presentation:style-name="a1129" draw:name="Title 1" svg:x="0in" svg:y="0.01997in" svg:width="13.33333in" svg:height="1.22565in" presentation:class="title" presentation:placeholder="false">
          <draw:text-box>
            <text:p text:style-name="a1128" text:class-names="" text:cond-style-name=""><text:span text:style-name="a1126" text:class-names="">References</text:span><text:span text:style-name="a1127" text:class-names=""/></text:p>
          </draw:text-box>
          <svg:title/>
          <svg:desc/>
        </draw:frame>
        <draw:frame draw:id="id140" presentation:style-name="a1169" draw:name="Content Placeholder 2" svg:x="0in" svg:y="1.24561in" svg:width="13.33333in" svg:height="6.25439in" presentation:class="outline" presentation:placeholder="false">
          <draw:text-box>
            <text:list text:style-name="a1136">
              <text:list-item>
                <text:p text:style-name="a1135" text:class-names="" text:cond-style-name=""><text:span text:style-name="a1130" text:class-names="">IBM (2021).<text:s text:c="1"/></text:span><text:span text:style-name="a1131" text:class-names="">Network security</text:span><text:span text:style-name="a1132" text:class-names="">. [online] Ibm.com. Available at:<text:s text:c="1"/></text:span><text:span text:style-name="a1133" text:class-names=""><text:a xlink:href="https://www.ibm.com/think/topics/network-security" text:style-name="" text:visited-style-name="">https://www.ibm.com/think/topics/network-security</text:a></text:span><text:span text:style-name="a1134" text:class-names="">.</text:span></text:p>
              </text:list-item>
            </text:list>
            <text:list text:style-name="a1146">
              <text:list-item>
                <text:p text:style-name="a1145" text:class-names="" text:cond-style-name=""><text:span text:style-name="a1137" text:class-names="">Nmap (2019).<text:s text:c="1"/></text:span><text:span text:style-name="a1138" text:class-names="">Chapter 15. Nmap reference guide |<text:s text:c="1"/></text:span><text:span text:style-name="a1139" text:class-names="">nmap</text:span><text:span text:style-name="a1140" text:class-names=""><text:s text:c="1"/>network scanning</text:span><text:span text:style-name="a1141" text:class-names="">. [online] Nmap.org. Available at:<text:s text:c="1"/></text:span><text:span text:style-name="a1142" text:class-names=""><text:a xlink:href="https://nmap.org/book/man.html" text:style-name="" text:visited-style-name="">https://nmap.org/book/man.html</text:a></text:span><text:span text:style-name="a1143" text:class-names="">.</text:span><text:span text:style-name="a1144" text:class-names=""/></text:p>
              </text:list-item>
            </text:list>
            <text:list text:style-name="a1155">
              <text:list-item>
                <text:p text:style-name="a1154" text:class-names="" text:cond-style-name=""><text:span text:style-name="a1147" text:class-names="">Boucheron, B.,<text:s text:c="1"/></text:span><text:span text:style-name="a1148" text:class-names="">Camisso</text:span><text:span text:style-name="a1149" text:class-names="">, J. and Abid, E. (2024).<text:s text:c="1"/></text:span><text:span text:style-name="a1150" text:class-names="">How to Set Up a Firewall with UFW on Ubuntu |<text:s text:c="1"/></text:span><text:span text:style-name="a1151" text:class-names="">DigitalOcean</text:span><text:span text:style-name="a1152" text:class-names="">. [online] www.digitalocean.com. Available at: https://www.digitalocean.com/community/tutorials/how-to-set-up-a-firewall-with-ufw-on-ubuntu.</text:span><text:span text:style-name="a1153" text:class-names=""/></text:p>
              </text:list-item>
            </text:list>
            <text:list text:style-name="a1162">
              <text:list-item>
                <text:p text:style-name="a1161" text:class-names="" text:cond-style-name=""><text:span text:style-name="a1156" text:class-names="">Amazon.com. (2019).<text:s text:c="1"/></text:span><text:span text:style-name="a1157" text:class-names="">Security Group Rules Reference - Amazon Elastic Compute Cloud</text:span><text:span text:style-name="a1158" text:class-names="">. [online] Available at:<text:s text:c="1"/></text:span><text:span text:style-name="a1159" text:class-names=""><text:a xlink:href="https://docs.aws.amazon.com/AWSEC2/latest/UserGuide/security-group-rules-reference.html" text:style-name="" text:visited-style-name="">https://docs.aws.amazon.com/AWSEC2/latest/UserGuide/security-group-rules-reference.html</text:a></text:span><text:span text:style-name="a1160" text:class-names="">.</text:span></text:p>
              </text:list-item>
            </text:list>
            <text:list text:style-name="a1165">
              <text:list-item>
                <text:p text:style-name="a1164" text:class-names="" text:cond-style-name=""><text:span text:style-name="a1163" text:class-names=""/></text:p>
              </text:list-item>
            </text:list>
            <text:list text:style-name="a1168">
              <text:list-item>
                <text:p text:style-name="a1167" text:class-names="" text:cond-style-name=""><text:span text:style-name="a116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30/05/2026</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30/05/2026</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30/05/2026</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30/05/2026</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30/05/2026</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30/05/2026</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30/05/2026</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30/05/2026</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30/05/2026</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30/05/2026</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30/05/2026</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30/05/2026</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30/05/2026</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30/05/2026</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30/05/2026</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30/05/2026</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30/05/2026</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30/05/2026</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30/05/2026</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30/05/2026</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30/05/2026</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30/05/2026</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30/05/2026</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30/05/2026</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Ayman Boucheneb</meta:initial-creator>
    <dc:creator>Ayman Boucheneb</dc:creator>
    <meta:creation-date>2026-05-26T09:28:22Z</meta:creation-date>
    <dc:date>2026-05-30T15:33:53Z</dc:date>
    <meta:editing-cycles>47</meta:editing-cycles>
    <meta:editing-duration>PT87599S</meta:editing-duration>
    <meta:document-statistic meta:paragraph-count="72" meta:word-count="1360"/>
  </office:meta>
</office:document-meta>
</file>