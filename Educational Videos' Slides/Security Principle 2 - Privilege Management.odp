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1in" fo:margin-left="1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90%" fo:text-align="left" style:tab-stop-distance="1in" fo:margin-left="1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solid" svg:stroke-width="0.01389in" svg:stroke-color="#000000" svg:stroke-opacity="100%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draw:fill="none" draw:stroke="solid" svg:stroke-width="0.01389in" svg:stroke-color="#000000" svg:strok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1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6" style:parent-style-name="Graphics">
      <style:graphic-properties draw:fill="none" draw:stroke="none"/>
    </style:style>
    <style:style style:family="graphic" style:name="a1067" style:parent-style-name="Graphics">
      <style:graphic-properties draw:fill="none" draw:stroke="none"/>
    </style:style>
    <style:style style:family="graphic" style:name="a1068">
      <style:graphic-properties draw:fill="none" draw:stroke="solid" svg:stroke-width="0.0625in" svg:stroke-color="#156082" svg:stroke-opacity="100%" draw:stroke-linejoin="miter" svg:stroke-linecap="but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 style:parent-style-name="Graphics">
      <style:graphic-properties draw:fill="none" fo:clip="rect(0.33492in, 0in, 0in, 0in)" draw:stroke="none"/>
    </style:style>
    <style:style style:family="graphic" style:name="a837" style:parent-style-name="Graphics">
      <style:graphic-properties draw:fill="none" draw:stroke="non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3" style:parent-style-name="Graphics">
      <style:graphic-properties draw:fill="none" draw:stroke="none"/>
    </style:style>
    <style:style style:family="graphic" style:name="a984" style:parent-style-name="Graphics">
      <style:graphic-properties draw:fill="none" draw:stroke="none"/>
    </style:style>
    <style:style style:family="graphic" style:name="a985" style:parent-style-name="Graphics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1" style:parent-style-name="Graphics">
      <style:graphic-properties draw:fill="none" draw:stroke="none"/>
    </style:style>
    <style:style style:family="graphic" style:name="a1122" style:parent-style-name="Graphics">
      <style:graphic-properties draw:fill="none" draw:stroke="non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6" style:parent-style-name="Graphics">
      <style:graphic-properties draw:fill="none" fo:clip="rect(0in, 0in, 0in, 0in)" draw:stroke="non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0in, 0in, 0.68912in, 0in)" draw:stroke="none"/>
    </style:style>
    <style:style style:family="graphic" style:name="a886" style:parent-style-name="Graphics">
      <style:graphic-properties draw:fill="none" draw:stroke="none"/>
    </style:style>
    <style:style style:family="paragraph" style:name="a7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9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draw:fill="none" draw:stroke="solid" svg:stroke-width="0.01389in" svg:stroke-color="#000000" svg:stroke-opacity="100%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19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79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148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1197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728" draw:master-page-name="Master1-Layout1-title-Title-Slide" presentation:presentation-page-layout-name="Master1-PPL1" draw:id="Slide-257">
        <draw:frame draw:id="id69" presentation:style-name="a731" draw:name="Title 1" svg:x="5.7937in" svg:y="0.7in" svg:width="6.8363in" svg:height="3.9in" presentation:class="title" presentation:placeholder="false">
          <draw:text-box>
            <text:p text:style-name="a730" text:class-names="" text:cond-style-name=""><text:span text:style-name="a729" text:class-names="">Security Principle 2: Privilege Management</text:span></text:p>
          </draw:text-box>
          <svg:title/>
          <svg:desc/>
        </draw:frame>
        <draw:frame draw:id="id70" presentation:style-name="a735" draw:name="Subtitle 2" svg:x="5.7937in" svg:y="5.07in" svg:width="6.8363in" svg:height="1.72in" presentation:class="subtitle" presentation:placeholder="false">
          <draw:text-box>
            <text:p text:style-name="a734" text:class-names="" text:cond-style-name=""><text:span text:style-name="a732" text:class-names="">Verifying identity in the digital world</text:span><text:span text:style-name="a733" text:class-names=""/></text:p>
          </draw:text-box>
          <svg:title/>
          <svg:desc/>
        </draw:frame>
        <draw:frame draw:id="id71" draw:style-name="a736" draw:name="Picture 2" svg:x="0in" svg:y="0.85315in" svg:width="5.7937in" svg:height="5.7937in" style:rel-width="scale" style:rel-height="scale">
          <draw:image xlink:href="media/image1.png" xlink:type="simple" xlink:show="embed" xlink:actuate="onLoad"/>
          <svg:title/>
          <svg:desc>Authorization - Free ui icons</svg:desc>
        </draw:frame>
      </draw:page>
      <draw:page draw:name="Slide3" draw:style-name="a737" draw:master-page-name="Master1-Layout2-obj-Title-and-Content" presentation:presentation-page-layout-name="Master1-PPL2" draw:id="Slide-258">
        <draw:frame draw:id="id72" presentation:style-name="a741" draw:name="Title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What is Privilege Management?</text:span><text:span text:style-name="a739" text:class-names=""/></text:p>
          </draw:text-box>
          <svg:title/>
          <svg:desc/>
        </draw:frame>
        <draw:frame draw:id="id73" presentation:style-name="a752" draw:name="Content Placeholder 2" svg:x="0.91667in" svg:y="1.99653in" svg:width="11.5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2" text:class-names="">Privilege Management</text:span><text:span text:style-name="a743" text:class-names="">:<text:s text:c="1"/></text:span><text:span text:style-name="a744" text:class-names="">a<text:s text:c="1"/></text:span><text:span text:style-name="a745" text:class-names="">method<text:s text:c="1"/></text:span><text:span text:style-name="a746" text:class-names="">of governing access to resources by permitted authorised users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When a user tries to access a resource, they will be checked if they are allowed to have this access. If they are, they can access it. If not, they’ll be denied.</text:span></text:p>
              </text:list-item>
            </text:list>
          </draw:text-box>
          <svg:title/>
          <svg:desc/>
        </draw:frame>
      </draw:page>
      <draw:page draw:name="Slide4" draw:style-name="a753" draw:master-page-name="Master1-Layout2-obj-Title-and-Content" presentation:presentation-page-layout-name="Master1-PPL2" draw:id="Slide-259">
        <draw:frame draw:id="id74" presentation:style-name="a757" draw:name="Title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4" text:class-names="">Why does Privilege Management matter?</text:span><text:span text:style-name="a755" text:class-names=""/></text:p>
          </draw:text-box>
          <svg:title/>
          <svg:desc/>
        </draw:frame>
        <draw:frame draw:id="id75" presentation:style-name="a792" draw:name="Content Placeholder 2" svg:x="0.61612in" svg:y="1.84754in" svg:width="12.08743in" svg:height="5.21053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8" text:class-names="">Privilege Management matters because it ensures that </text:span><text:span text:style-name="a759" text:class-names="">only authorised<text:s text:c="1"/></text:span><text:span text:style-name="a760" text:class-names="">users can access the appropriate resources.</text:span></text:p>
              </text:list-item>
            </text:list>
            <text:list text:style-name="a770">
              <text:list-item>
                <text:p text:style-name="a769" text:class-names="" text:cond-style-name=""><text:span text:style-name="a763" text:class-names="">Limiting the number of users who have access to resources increases system security because it ensures users have<text:s text:c="1"/></text:span><text:span text:style-name="a764" text:class-names="">access to necessities<text:s text:c="1"/></text:span><text:span text:style-name="a765" text:class-names="">only where they<text:s text:c="1"/></text:span><text:span text:style-name="a766" text:class-names="">can still operate<text:s text:c="1"/></text:span><text:span text:style-name="a767" text:class-names="">to accomplish their tasks (Joint Task Force, 2020).</text:span><text:span text:style-name="a768" text:class-names=""/></text:p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1" text:class-names="">Verizon’s 2024 Data Breach Investigations report found that<text:s text:c="1"/></text:span><text:span text:style-name="a772" text:class-names="">40%</text:span><text:span text:style-name="a773" text:class-names=""><text:s text:c="1"/>of data breaches involved privileged accounts<text:s text:c="1"/></text:span><text:span text:style-name="a774" text:class-names="">(Verizon, 2024)</text:span><text:span text:style-name="a775" text:class-names="">.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78" text:class-names="">Organisations must<text:s text:c="1"/></text:span><text:span text:style-name="a779" text:class-names="">apply to<text:s text:c="1"/></text:span><text:span text:style-name="a780" text:class-names="">each<text:s text:c="1"/></text:span><text:span text:style-name="a781" text:class-names="">user the appropriate privilege level based on their role, and ensure no one exploits their current privilege level, whether necessary or not.</text:span></text:p>
                  </text:list-item>
                </text:list>
              </text:list-item>
            </text:list>
            <text:list text:style-name="a788">
              <text:list-item>
                <text:p text:style-name="a787" text:class-names="" text:cond-style-name=""><text:span text:style-name="a784" text:class-names="">Let's see what happens when privilege management fails in Ubuntu and AWS, and<text:s text:c="1"/></text:span><text:span text:style-name="a785" text:class-names="">how to fix it</text:span><text:span text:style-name="a786" text:class-names="">.</text:span></text:p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799">
          <draw:page-thumbnail draw:page-number="3" svg:x="0.75in" svg:y="1.25in" svg:width="6in" svg:height="3.375in" presentation:class="page" draw:id="id76" presentation:style-name="a793" draw:name="Slide Image Placeholder 1">
            <svg:title/>
            <svg:desc/>
          </draw:page-thumbnail>
          <draw:frame draw:id="id77" presentation:style-name="a79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8" draw:style-name="a798" draw:name="Slide Number Placeholder 3" svg:x="4.24826in" svg:y="9.49826in" svg:width="3.25in" svg:height="0.50174in">
            <draw:text-box>
              <text:p text:style-name="a797" text:class-names="" text:cond-style-name=""><text:span text:style-name="a795" text:class-names=""><text:page-number style:num-format="1" text:fixed="false"/></text:span><text:span text:style-name="a796" text:class-names=""/></text:p>
            </draw:text-box>
            <svg:title/>
            <svg:desc/>
          </draw:frame>
        </presentation:notes>
      </draw:page>
      <draw:page draw:name="Slide5" draw:style-name="a800" draw:master-page-name="Master1-Layout2-obj-Title-and-Content" presentation:presentation-page-layout-name="Master1-PPL2" draw:id="Slide-260">
        <draw:frame draw:id="id79" presentation:style-name="a804" draw:name="Title 1" svg:x="6.66667in" svg:y="0in" svg:width="6.66667in" svg:height="1.46123in" presentation:class="title" presentation:placeholder="false">
          <draw:text-box>
            <text:p text:style-name="a803" text:class-names="" text:cond-style-name=""><text:span text:style-name="a801" text:class-names="">Initial Linux Vulnerable Setup</text:span><text:span text:style-name="a802" text:class-names=""/></text:p>
          </draw:text-box>
          <svg:title/>
          <svg:desc/>
        </draw:frame>
        <draw:frame draw:id="id80" draw:style-name="a809" draw:name="TextBox 4" svg:x="0in" svg:y="4.86125in" svg:width="6.66667in" svg:height="0.70684in">
          <draw:text-box>
            <text:p text:style-name="a808" text:class-names="" text:cond-style-name=""><text:span text:style-name="a805" text:class-names="">Figure 2:<text:s text:c="1"/></text:span><text:span text:style-name="a806" text:class-names="">Olivia Wright implementing the NOPASSWD to herself</text:span><text:span text:style-name="a807" text:class-names=""/></text:p>
          </draw:text-box>
          <svg:title/>
          <svg:desc/>
        </draw:frame>
        <draw:frame draw:id="id81" draw:style-name="a835" draw:name="Content Placeholder 2" svg:x="6.66667in" svg:y="1.46123in" svg:width="6.66667in" svg:height="6.03877in">
          <draw:text-box>
            <text:list text:style-name="a815">
              <text:list-item>
                <text:p text:style-name="a814" text:class-names="" text:cond-style-name=""><text:span text:style-name="a810" text:class-names="">Sudo access<text:s text:c="1"/></text:span><text:span text:style-name="a811" text:class-names="">– grants the user the ability to run commands as root. The root is a powerful user as they are allowed to perform the following<text:s text:c="1"/></text:span><text:span text:style-name="a812" text:class-names="">(www.ssh.com, n.d.)</text:span><text:span text:style-name="a813" text:class-names="">:</text:span></text:p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Configure network settings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Install system applications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Change permissions and contents of files</text:span></text:p>
                  </text:list-item>
                </text:list>
              </text:list-item>
            </text:list>
            <text:list text:style-name="a830">
              <text:list-item>
                <text:p text:style-name="a829" text:class-names="" text:cond-style-name=""><text:span text:style-name="a825" text:class-names="">NOPASSWD rule<text:s text:c="1"/></text:span><text:span text:style-name="a826" text:class-names="">– removes password authentication of Administration department member Olivia Wright inside the<text:s text:c="1"/></text:span><text:span text:style-name="a827" text:class-names="">visudo</text:span><text:span text:style-name="a828" text:class-names=""><text:s text:c="1"/>file. Allows Olivia to execute root commands whenever she wants without verification.</text:span></text:p>
              </text:list-item>
            </text:list>
            <text:list text:style-name="a834">
              <text:list-item>
                <text:p text:style-name="a833" text:class-names="" text:cond-style-name=""><text:span text:style-name="a831" text:class-names="">The other 3 members are granted the ability to run commands as root, as they are members of the IT team. They are responsible for securing the IT infrastructure.</text:span><text:span text:style-name="a832" text:class-names=""/></text:p>
              </text:list-item>
            </text:list>
          </draw:text-box>
          <svg:title/>
          <svg:desc/>
        </draw:frame>
        <draw:frame draw:id="id82" draw:style-name="a836" draw:name="Picture 8" svg:x="-0.00001in" svg:y="3.21391in" svg:width="6.66666in" svg:height="1.64734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837" draw:name="Picture 10" svg:x="-0.00001in" svg:y="0.65283in" svg:width="6.66666in" svg:height="1.3806in" style:rel-width="scale" style:rel-height="scale">
          <draw:image xlink:href="media/image3.png" xlink:type="simple" xlink:show="embed" xlink:actuate="onLoad"/>
          <svg:title/>
          <svg:desc/>
        </draw:frame>
        <draw:frame draw:id="id84" draw:style-name="a843" draw:name="TextBox 10" svg:x="-0.00878in" svg:y="1.98516in" svg:width="6.67544in" svg:height="1.00977in">
          <draw:text-box>
            <text:p text:style-name="a842" text:class-names="" text:cond-style-name=""><text:span text:style-name="a838" text:class-names="">Figure 1:<text:s text:c="1"/></text:span><text:span text:style-name="a839" text:class-names="">Olivia Wright and the 3 members of the IT team granted Sudo access by being added to group named “sudo”.<text:s text:c="1"/></text:span><text:span text:style-name="a840" text:class-names="">File “visudo” is about to be opened</text:span><text:span text:style-name="a841" text:class-names=""/></text:p>
          </draw:text-box>
          <svg:title/>
          <svg:desc/>
        </draw:frame>
      </draw:page>
      <draw:page draw:name="Slide21" draw:style-name="a844" draw:master-page-name="Master1-Layout2-obj-Title-and-Content" presentation:presentation-page-layout-name="Master1-PPL2" draw:id="Slide-276">
        <draw:frame draw:id="id85" presentation:style-name="a848" draw:name="Title 1" svg:x="6.66667in" svg:y="0in" svg:width="6.66667in" svg:height="1.46123in" presentation:class="title" presentation:placeholder="false">
          <draw:text-box>
            <text:p text:style-name="a847" text:class-names="" text:cond-style-name=""><text:span text:style-name="a845" text:class-names="">Linux Exploitation Process</text:span><text:span text:style-name="a846" text:class-names=""/></text:p>
          </draw:text-box>
          <svg:title/>
          <svg:desc/>
        </draw:frame>
        <draw:frame draw:id="id86" draw:style-name="a884" draw:name="Content Placeholder 2" svg:x="6.66667in" svg:y="1.46123in" svg:width="6.66667in" svg:height="6.03877in">
          <draw:text-box>
            <text:list text:style-name="a856">
              <text:list-item>
                <text:p text:style-name="a855" text:class-names="" text:cond-style-name=""><text:span text:style-name="a849" text:class-names="">“</text:span><text:span text:style-name="a850" text:class-names="">sudo</text:span><text:span text:style-name="a851" text:class-names=""><text:s text:c="1"/>find . –exec /bin/</text:span><text:span text:style-name="a852" text:class-names="">sh</text:span><text:span text:style-name="a853" text:class-names=""><text:s text:c="1"/>; -quit”<text:s text:c="1"/></text:span><text:span text:style-name="a854" text:class-names="">– command allows Olivia to abuse the “find” tool, which Olivia can run as root to open a root shell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This gives her unrestricted control over the entire system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0" text:class-names="">Obtaining organisation’s information<text:s text:c="1"/></text:span><text:span text:style-name="a861" text:class-names="">– below the command, she uses the “cat” command to view the contents of the<text:s text:c="1"/></text:span><text:span text:style-name="a862" text:class-names="">payroll.txt</text:span><text:span text:style-name="a863" text:class-names=""><text:s text:c="1"/>file inside the finance department’s folder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Having access to financial records can reveal info such as income, tax and account details. Data can enable identity theft and financial abuse.</text:span></text:p>
              </text:list-item>
            </text:list>
            <text:list text:style-name="a876">
              <text:list-item>
                <text:p text:style-name="a875" text:class-names="" text:cond-style-name=""><text:span text:style-name="a869" text:class-names="">Adjusting account settings of organisations</text:span><text:span text:style-name="a870" text:class-names=""><text:s text:c="1"/>– Olivia writes “</text:span><text:span text:style-name="a871" text:class-names="">sudo</text:span><text:span text:style-name="a872" text:class-names=""><text:s text:c="1"/>passwd<text:s text:c="1"/></text:span><text:span text:style-name="a873" text:class-names="">noah_johnson</text:span><text:span text:style-name="a874" text:class-names="">” to change the password of employee Noah Johnson without him knowing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She then dares to add herself as an “anonymous”, an extra account that shouldn’t be part of the system.</text:span></text:p>
              </text:list-item>
            </text:list>
            <text:list text:style-name="a883">
              <text:list-item>
                <text:p text:style-name="a882" text:class-names="" text:cond-style-name=""><text:span text:style-name="a880" text:class-names="">Only employees, accompanied by their real names as usernames, should exist within the system</text:span><text:span text:style-name="a881" text:class-names=""/></text:p>
              </text:list-item>
            </text:list>
          </draw:text-box>
          <svg:title/>
          <svg:desc/>
        </draw:frame>
        <draw:frame draw:id="id87" draw:style-name="a885" draw:name="Picture 13" svg:x="0.56191in" svg:y="0in" svg:width="5.53406in" svg:height="4.46645in" style:rel-width="scale" style:rel-height="scale">
          <draw:image xlink:href="media/image4.png" xlink:type="simple" xlink:show="embed" xlink:actuate="onLoad"/>
          <svg:title/>
          <svg:desc/>
        </draw:frame>
        <draw:frame draw:id="id88" draw:style-name="a886" draw:name="Picture 15" svg:x="0in" svg:y="5.20032in" svg:width="4.13454in" svg:height="0.90606in" style:rel-width="scale" style:rel-height="scale">
          <draw:image xlink:href="media/image5.png" xlink:type="simple" xlink:show="embed" xlink:actuate="onLoad"/>
          <svg:title/>
          <svg:desc/>
        </draw:frame>
        <draw:frame draw:id="id89" draw:style-name="a887" draw:name="Picture 17" svg:x="0in" svg:y="6.22403in" svg:width="4.13454in" svg:height="1.27597in" style:rel-width="scale" style:rel-height="scale">
          <draw:image xlink:href="media/image6.png" xlink:type="simple" xlink:show="embed" xlink:actuate="onLoad"/>
          <svg:title/>
          <svg:desc/>
        </draw:frame>
        <draw:frame draw:id="id90" draw:style-name="a895" draw:name="TextBox 9" svg:x="-0.00878in" svg:y="4.46645in" svg:width="6.67544in" svg:height="0.63952in">
          <draw:text-box>
            <text:p text:style-name="a894" text:class-names="" text:cond-style-name=""><text:span text:style-name="a888" text:class-names="">Figure<text:s text:c="1"/></text:span><text:span text:style-name="a889" text:class-names="">3</text:span><text:span text:style-name="a890" text:class-names="">:<text:s text:c="1"/></text:span><text:span text:style-name="a891" text:class-names="">Olivia Wright abusing the “find” tool and obtaining the income of her fellow<text:s text:c="1"/></text:span><text:span text:style-name="a892" text:class-names="">employees in the payroll.txt file</text:span><text:span text:style-name="a893" text:class-names=""/></text:p>
          </draw:text-box>
          <svg:title/>
          <svg:desc/>
        </draw:frame>
        <draw:frame draw:id="id91" draw:style-name="a899" draw:name="TextBox 11" svg:x="4.13454in" svg:y="5.57932in" svg:width="2.53212in" svg:height="1.44733in">
          <draw:text-box>
            <text:p text:style-name="a898" text:class-names="" text:cond-style-name=""><text:span text:style-name="a896" text:class-names="">Figure 4&amp;5:<text:s text:c="1"/></text:span><text:span text:style-name="a897" text:class-names="">Olivia Wright changing Noah Johnson’ password and adding an anonymous account</text:span></text:p>
          </draw:text-box>
          <svg:title/>
          <svg:desc/>
        </draw:frame>
      </draw:page>
      <draw:page draw:name="Slide8" draw:style-name="a900" draw:master-page-name="Master1-Layout2-obj-Title-and-Content" presentation:presentation-page-layout-name="Master1-PPL2" draw:id="Slide-263">
        <draw:frame draw:id="id92" presentation:style-name="a904" draw:name="Title 1" svg:x="0.90983in" svg:y="0in" svg:width="11.5in" svg:height="1.44965in" presentation:class="title" presentation:placeholder="false">
          <draw:text-box>
            <text:p text:style-name="a903" text:class-names="" text:cond-style-name=""><text:span text:style-name="a901" text:class-names="">Why did the exploitation work?</text:span><text:span text:style-name="a902" text:class-names=""/></text:p>
          </draw:text-box>
          <svg:title/>
          <svg:desc/>
        </draw:frame>
        <draw:frame draw:id="id93" presentation:style-name="a949" draw:name="Content Placeholder 2" svg:x="0.61612in" svg:y="1.10526in" svg:width="12.08743in" svg:height="6.26316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5" text:class-names="">The exploitation worked because a member of the business was<text:s text:c="1"/></text:span><text:span text:style-name="a906" text:class-names="">allowed an additional privilege operation<text:s text:c="1"/></text:span><text:span text:style-name="a907" text:class-names="">she was not meant to have at all.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0" text:class-names="">Olivia Wright is a member of the Administration<text:s text:c="1"/></text:span><text:span text:style-name="a911" text:class-names="">department;</text:span><text:span text:style-name="a912" text:class-names=""><text:s text:c="1"/></text:span><text:span text:style-name="a913" text:class-names="">she’s meant to<text:s text:c="1"/></text:span><text:span text:style-name="a914" text:class-names="">be in charge of</text:span><text:span text:style-name="a915" text:class-names=""><text:s text:c="1"/>overseeing<text:s text:c="1"/></text:span><text:span text:style-name="a916" text:class-names="">all of</text:span><text:span text:style-name="a917" text:class-names=""><text:s text:c="1"/>its daily operations. She makes sure every employee is doing their job correctly.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Henry Ward, Lucy Mason and Theo Lawson are the 3 members of the IT team. It should be only their job to configure network systems and implement the privilege management themselves.<text:s text:c="1"/>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3" text:class-names="">These operations<text:s text:c="1"/></text:span><text:span text:style-name="a924" text:class-names="">link to their role<text:s text:c="1"/></text:span><text:span text:style-name="a925" text:class-names="">of ensuring the organisation’s IT structure is correctly implemented.</text:span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28" text:class-names="">There was a<text:s text:c="1"/></text:span><text:span text:style-name="a929" text:class-names="">lack of review<text:s text:c="1"/></text:span><text:span text:style-name="a930" text:class-names="">of assigned user privileges to determine if they were necessary for each employee to ensure they had the necessary privileges to complete their tasks. This should be done<text:s text:c="1"/></text:span><text:span text:style-name="a931" text:class-names="">periodically</text:span><text:span text:style-name="a932" text:class-names="">.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An over-privileged account can compromise the confidentiality, integrity and accessibility of a business’s system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8" text:class-names="">Internal threats:</text:span><text:span text:style-name="a939" text:class-names=""><text:s text:c="1"/>sometimes employees themselves attack a system, not just hackers. Intentionally or accidentally, they can threaten the system by mishandling confidential data or inserting malware onto the network.</text:span></text:p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2" text:class-names="">Verizon’s 2024 Data Breach Investigations report found that<text:s text:c="1"/></text:span><text:span text:style-name="a943" text:class-names="">19%</text:span><text:span text:style-name="a944" text:class-names=""><text:s text:c="1"/>of breaches involved<text:s text:c="1"/></text:span><text:span text:style-name="a945" text:class-names="">internal actors</text:span><text:span text:style-name="a946" text:class-names=""><text:s text:c="1"/>(Swif.ai, 2026)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56">
          <draw:page-thumbnail draw:page-number="6" svg:x="0.75in" svg:y="1.25in" svg:width="6in" svg:height="3.375in" presentation:class="page" draw:id="id94" presentation:style-name="a950" draw:name="Slide Image Placeholder 1">
            <svg:title/>
            <svg:desc/>
          </draw:page-thumbnail>
          <draw:frame draw:id="id95" presentation:style-name="a9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6" draw:style-name="a955" draw:name="Slide Number Placeholder 3" svg:x="4.24826in" svg:y="9.49826in" svg:width="3.25in" svg:height="0.50174in">
            <draw:text-box>
              <text:p text:style-name="a954" text:class-names="" text:cond-style-name=""><text:span text:style-name="a952" text:class-names=""><text:page-number style:num-format="1" text:fixed="false"/></text:span><text:span text:style-name="a953" text:class-names=""/></text:p>
            </draw:text-box>
            <svg:title/>
            <svg:desc/>
          </draw:frame>
        </presentation:notes>
      </draw:page>
      <draw:page draw:name="Slide9" draw:style-name="a957" draw:master-page-name="Master1-Layout2-obj-Title-and-Content" presentation:presentation-page-layout-name="Master1-PPL2" draw:id="Slide-264">
        <draw:frame draw:id="id97" draw:style-name="a961" draw:name="Title 1" svg:x="6.66667in" svg:y="0in" svg:width="6.66667in" svg:height="1.46123in">
          <draw:text-box>
            <text:p text:style-name="a960" text:class-names="" text:cond-style-name=""><text:span text:style-name="a958" text:class-names="">Solutions for preventing exploitation: Correcting the initial exploitation</text:span><text:span text:style-name="a959" text:class-names=""/></text:p>
          </draw:text-box>
          <svg:title/>
          <svg:desc/>
        </draw:frame>
        <draw:frame draw:id="id98" draw:style-name="a982" draw:name="Content Placeholder 2" svg:x="6.66667in" svg:y="1.46123in" svg:width="6.66667in" svg:height="6.03877in">
          <draw:text-box>
            <text:list text:style-name="a965">
              <text:list-item>
                <text:p text:style-name="a964" text:class-names="" text:cond-style-name=""><text:span text:style-name="a962" text:class-names="">Remove extra privilege access from Olivia<text:s text:c="1"/></text:span><text:span text:style-name="a963" text:class-names="">– using “sudo gpasswd –d {username} {name of group}” command, Olivia Wright was removed from the “sudo” group.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Being part of it is what allowed her to have root access</text:span></text:p>
                  </text:list-item>
                </text:list>
              </text:list-item>
            </text:list>
            <text:list text:style-name="a975">
              <text:list-item>
                <text:p text:style-name="a974" text:class-names="" text:cond-style-name=""><text:span text:style-name="a969" text:class-names="">NOPASSWD policy removed</text:span><text:span text:style-name="a970" text:class-names=""><text:s text:c="1"/>– Performed in the “visudo” file to ensure protection and authorised access of systems by making sure employees<text:s text:c="1"/></text:span><text:span text:style-name="a971" text:class-names="">have to</text:span><text:span text:style-name="a972" text:class-names=""><text:s text:c="1"/>verify their identity.</text:span><text:span text:style-name="a973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6" text:class-names="">Verification of who has privileged access<text:s text:c="1"/></text:span><text:span text:style-name="a977" text:class-names="">“getent group sudo” shows that only the 3<text:s text:c="1"/></text:span><text:span text:style-name="a978" text:class-names="">IT employees have root access, as it should.</text:span><text:span text:style-name="a979" text:class-names=""/></text:p>
              </text:list-item>
            </text:list>
          </draw:text-box>
          <svg:title/>
          <svg:desc/>
        </draw:frame>
        <draw:frame draw:id="id99" draw:style-name="a983" draw:name="Picture 8" svg:x="-0.00877in" svg:y="5.28112in" svg:width="6.68421in" svg:height="0.48532in" style:rel-width="scale" style:rel-height="scale">
          <draw:image xlink:href="media/image7.png" xlink:type="simple" xlink:show="embed" xlink:actuate="onLoad"/>
          <svg:title/>
          <svg:desc/>
        </draw:frame>
        <draw:frame draw:id="id100" draw:style-name="a984" draw:name="Picture 4" svg:x="0in" svg:y="2.61323in" svg:width="6.66666in" svg:height="1.57155in" style:rel-width="scale" style:rel-height="scale">
          <draw:image xlink:href="media/image8.png" xlink:type="simple" xlink:show="embed" xlink:actuate="onLoad"/>
          <svg:title/>
          <svg:desc/>
        </draw:frame>
        <draw:frame draw:id="id101" draw:style-name="a985" draw:name="Picture 6" svg:x="0in" svg:y="0.67345in" svg:width="6.66666in" svg:height="1.10476in" style:rel-width="scale" style:rel-height="scale">
          <draw:image xlink:href="media/image9.png" xlink:type="simple" xlink:show="embed" xlink:actuate="onLoad"/>
          <svg:title/>
          <svg:desc/>
        </draw:frame>
        <draw:frame draw:id="id102" draw:style-name="a989" draw:name="TextBox 11" svg:x="-0.00877in" svg:y="1.78126in" svg:width="6.67544in" svg:height="0.40391in">
          <draw:text-box>
            <text:p text:style-name="a988" text:class-names="" text:cond-style-name=""><text:span text:style-name="a986" text:class-names="">Figure 6:<text:s text:c="1"/></text:span><text:span text:style-name="a987" text:class-names="">Olivia Wright has root access revoked from her</text:span></text:p>
          </draw:text-box>
          <svg:title/>
          <svg:desc/>
        </draw:frame>
        <draw:frame draw:id="id103" draw:style-name="a995" draw:name="TextBox 12" svg:x="0in" svg:y="4.18477in" svg:width="6.67544in" svg:height="0.70684in">
          <draw:text-box>
            <text:p text:style-name="a994" text:class-names="" text:cond-style-name=""><text:span text:style-name="a990" text:class-names="">Figure<text:s text:c="1"/></text:span><text:span text:style-name="a991" text:class-names="">7</text:span><text:span text:style-name="a992" text:class-names="">:<text:s text:c="1"/></text:span><text:span text:style-name="a993" text:class-names="">Olivia Wright has NOPASSWD policy in “visudo” file removed</text:span></text:p>
          </draw:text-box>
          <svg:title/>
          <svg:desc/>
        </draw:frame>
        <draw:frame draw:id="id104" draw:style-name="a999" draw:name="TextBox 13" svg:x="0in" svg:y="5.71874in" svg:width="6.67544in" svg:height="0.70684in">
          <draw:text-box>
            <text:p text:style-name="a998" text:class-names="" text:cond-style-name=""><text:span text:style-name="a996" text:class-names="">Figure 8:<text:s text:c="1"/></text:span><text:span text:style-name="a997" text:class-names="">Verification that only the IT employees can have root access</text:span></text:p>
          </draw:text-box>
          <svg:title/>
          <svg:desc/>
        </draw:frame>
        <presentation:notes draw:style-name="a1011">
          <draw:page-thumbnail draw:page-number="7" svg:x="0.75in" svg:y="1.25in" svg:width="6in" svg:height="3.375in" presentation:class="page" draw:id="id105" presentation:style-name="a1000" draw:name="Slide Image Placeholder 1">
            <svg:title/>
            <svg:desc/>
          </draw:page-thumbnail>
          <draw:frame draw:id="id106" presentation:style-name="a1006" draw:name="Notes Placeholder 2" svg:x="0.75in" svg:y="4.8125in" svg:width="6in" svg:height="3.9375in" presentation:class="notes" presentation:placeholder="false">
            <draw:text-box>
              <text:p text:style-name="a1005" text:class-names="" text:cond-style-name=""><text:span text:style-name="a1001" text:class-names="">Canonical (2019).<text:s text:c="1"/></text:span><text:span text:style-name="a1002" text:class-names="">Ubuntu Manpage: pam_pwquality - PAM module to perform password quality checking</text:span><text:span text:style-name="a1003" text:class-names="">. [online] Ubuntu.com. Available at: https://manpages.ubuntu.com/manpages/jammy/man8/pam_pwquality.8.html.</text:span><text:span text:style-name="a1004" text:class-names=""/></text:p>
            </draw:text-box>
            <svg:title/>
            <svg:desc/>
          </draw:frame>
          <draw:frame draw:id="id107" draw:style-name="a1010" draw:name="Slide Number Placeholder 3" svg:x="4.24826in" svg:y="9.49826in" svg:width="3.25in" svg:height="0.50174in">
            <draw:text-box>
    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    </draw:text-box>
            <svg:title/>
            <svg:desc/>
          </draw:frame>
        </presentation:notes>
      </draw:page>
      <draw:page draw:name="Slide22" draw:style-name="a1012" draw:master-page-name="Master1-Layout2-obj-Title-and-Content" presentation:presentation-page-layout-name="Master1-PPL2" draw:id="Slide-277">
        <draw:frame draw:id="id108" presentation:style-name="a1016" draw:name="Title 1" svg:x="1.14667in" svg:y="0.24in" svg:width="11.04in" svg:height="1.46123in" presentation:class="title" presentation:placeholder="false">
          <draw:text-box>
            <text:p text:style-name="a1015" text:class-names="" text:cond-style-name=""><text:span text:style-name="a1013" text:class-names="">Solutions for preventing exploitation: Practices within the work environment</text:span><text:span text:style-name="a1014" text:class-names=""/></text:p>
          </draw:text-box>
          <svg:title/>
          <svg:desc/>
        </draw:frame>
        <draw:frame draw:id="id109" draw:style-name="a1044" draw:name="Content Placeholder 2" svg:x="0.91333in" svg:y="1.70123in" svg:width="11.50667in" svg:height="5.55877in">
          <draw:text-box>
            <text:list text:style-name="a1019">
              <text:list-item>
                <text:p text:style-name="a1018" text:class-names="" text:cond-style-name=""><text:span text:style-name="a1017" text:class-names="">Periodic Reviews of assigned user privileges for each employee to determine if they have the necessary amount to perform their respective operations (Joint Task Force, 2020).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If unnecessary permission is identified, remove that error immediately.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The rights of accessing resources should be determined based on what is needed to perform their roles.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Investigate and properly assess any attempts by unauthorised users or devices to connect to the system, to identify how it has occurred and mitigate the access point.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est access using user accounts to verify that permissions match job responsibilities.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Additional NCSC Guidance (www.ncsc.gov.uk, n.d.):</text:span></text:p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5" text:class-names="">Justify administration intent:</text:span><text:span text:style-name="a1036" text:class-names=""><text:s text:c="1"/>You should be able to explain why you’ve set permissions as they’ve been set to gain approval and deter malicious insiders.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39" text:class-names="">Use appropriate approvals:</text:span><text:span text:style-name="a1040" text:class-names=""><text:s text:c="1"/>Carefully consider the request by referring to the approval rules that govern access to your systems and data.</text:span><text:span text:style-name="a104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045" draw:master-page-name="Master1-Layout2-obj-Title-and-Content" presentation:presentation-page-layout-name="Master1-PPL2" draw:id="Slide-270">
        <draw:frame draw:id="id110" presentation:style-name="a1061" draw:name="Content Placeholder 2" svg:x="6.71793in" svg:y="1.7in" svg:width="6.60173in" svg:height="5.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6" text:class-names="">In AWS, Identity Access Management (IAM) is used to<text:s text:c="1"/></text:span><text:span text:style-name="a1047" text:class-names="">“manage and scale workload and workforce securely supporting your agility.”<text:s text:c="1"/></text:span><text:span text:style-name="a1048" text:class-names="">(Amazon Web Services, 2024)</text:span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It is where you assign users and groups their “permissions policies”, which define the permissions employees have in the system.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As shown in Fig. 9, both the Marketing and Operations groups have policies attached so they can perform their respective operations.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However, these policies have been assigned incorrectly…</text:span></text:p>
              </text:list-item>
            </text:list>
          </draw:text-box>
          <svg:title/>
          <svg:desc/>
        </draw:frame>
        <draw:frame draw:id="id111" presentation:style-name="a1065" draw:name="Title 1" svg:x="6.64871in" svg:y="0in" svg:width="6.67095in" svg:height="1.7in" presentation:class="title" presentation:placeholder="false">
          <draw:text-box>
            <text:p text:style-name="a1064" text:class-names="" text:cond-style-name=""><text:span text:style-name="a1062" text:class-names="">Initial AWS Vulnerable Setup</text:span><text:span text:style-name="a1063" text:class-names=""/></text:p>
          </draw:text-box>
          <svg:title/>
          <svg:desc/>
        </draw:frame>
        <draw:frame draw:id="id112" draw:style-name="a1066" draw:name="Picture 6" svg:x="0.06921in" svg:y="0.74309in" svg:width="3.32999in" svg:height="5.31382in" style:rel-width="scale" style:rel-height="scale">
          <draw:image xlink:href="media/image10.png" xlink:type="simple" xlink:show="embed" xlink:actuate="onLoad"/>
          <svg:title/>
          <svg:desc/>
        </draw:frame>
        <draw:frame draw:id="id113" draw:style-name="a1067" draw:name="Picture 8" svg:x="3.3992in" svg:y="0.74309in" svg:width="3.31872in" svg:height="5.31382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3.3992in" svg:y1="0.74309in" svg:x2="3.3992in" svg:y2="6.05691in" draw:id="id114" draw:style-name="a1068" draw:name="Straight Connector 13">
          <svg:title/>
          <svg:desc/>
        </draw:connector>
        <draw:frame draw:id="id115" draw:style-name="a1072" draw:name="TextBox 13" svg:x="0.06921in" svg:y="6.05691in" svg:width="6.67544in" svg:height="0.70684in">
          <draw:text-box>
            <text:p text:style-name="a1071" text:class-names="" text:cond-style-name=""><text:span text:style-name="a1069" text:class-names="">Figure 9:<text:s text:c="1"/></text:span><text:span text:style-name="a1070" text:class-names="">Marketing and Operations groups have both of their permissions being mixed up the wrong way round.</text:span></text:p>
          </draw:text-box>
          <svg:title/>
          <svg:desc/>
        </draw:frame>
        <presentation:notes draw:style-name="a1079">
          <draw:page-thumbnail draw:page-number="9" svg:x="0.75in" svg:y="1.25in" svg:width="6in" svg:height="3.375in" presentation:class="page" draw:id="id116" presentation:style-name="a1073" draw:name="Slide Image Placeholder 1">
            <svg:title/>
            <svg:desc/>
          </draw:page-thumbnail>
          <draw:frame draw:id="id117" presentation:style-name="a10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1078" draw:name="Slide Number Placeholder 3" svg:x="4.24826in" svg:y="9.49826in" svg:width="3.25in" svg:height="0.50174in">
            <draw:text-box>
              <text:p text:style-name="a1077" text:class-names="" text:cond-style-name=""><text:span text:style-name="a1075" text:class-names=""><text:page-number style:num-format="1" text:fixed="false"/></text:span><text:span text:style-name="a1076" text:class-names=""/></text:p>
            </draw:text-box>
            <svg:title/>
            <svg:desc/>
          </draw:frame>
        </presentation:notes>
      </draw:page>
      <draw:page draw:name="Slide24" draw:style-name="a1080" draw:master-page-name="Master1-Layout2-obj-Title-and-Content" presentation:presentation-page-layout-name="Master1-PPL2" draw:id="Slide-279">
        <draw:frame draw:id="id119" presentation:style-name="a1084" draw:name="Title 1" svg:x="0.90983in" svg:y="0.13158in" svg:width="11.5in" svg:height="1.44965in" presentation:class="title" presentation:placeholder="false">
          <draw:text-box>
            <text:p text:style-name="a1083" text:class-names="" text:cond-style-name=""><text:span text:style-name="a1081" text:class-names="">What is wrong with the mistake?</text:span><text:span text:style-name="a1082" text:class-names=""/></text:p>
          </draw:text-box>
          <svg:title/>
          <svg:desc/>
        </draw:frame>
        <draw:frame draw:id="id120" presentation:style-name="a1112" draw:name="Content Placeholder 2" svg:x="0.61612in" svg:y="1.66667in" svg:width="12.08743in" svg:height="5.70175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5" text:class-names="">These policies were assigned incorrectly because they<text:s text:c="1"/></text:span><text:span text:style-name="a1086" text:class-names="">were mixed up</text:span><text:span text:style-name="a1087" text:class-names="">.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0" text:class-names="">This means that both the Operations and Marketing departments<text:s text:c="1"/></text:span><text:span text:style-name="a1091" text:class-names="">won’t</text:span><text:span text:style-name="a1092" text:class-names=""><text:s text:c="1"/>be able to<text:s text:c="1"/></text:span><text:span text:style-name="a1093" text:class-names="">perform</text:span><text:span text:style-name="a1094" text:class-names=""><text:s text:c="1"/>their<text:s text:c="1"/></text:span><text:span text:style-name="a1095" text:class-names="">correct</text:span><text:span text:style-name="a1096" text:class-names=""><text:s text:c="1"/></text:span><text:span text:style-name="a1097" text:class-names="">operations</text:span><text:span text:style-name="a1098" text:class-names="">.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This would hold back a list of roles to be performed behind and increase pressure and workload on the employees of the departments.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4" text:class-names="">There was a<text:s text:c="1"/></text:span><text:span text:style-name="a1105" text:class-names="">lack of review<text:s text:c="1"/></text:span><text:span text:style-name="a1106" text:class-names="">of assigned user privileges to determine if each department had the correct policies to ensure they had the necessary privileges to complete their tasks.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  <presentation:notes draw:style-name="a1119">
          <draw:page-thumbnail draw:page-number="10" svg:x="0.75in" svg:y="1.25in" svg:width="6in" svg:height="3.375in" presentation:class="page" draw:id="id121" presentation:style-name="a1113" draw:name="Slide Image Placeholder 1">
            <svg:title/>
            <svg:desc/>
          </draw:page-thumbnail>
          <draw:frame draw:id="id122" presentation:style-name="a11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1118" draw:name="Slide Number Placeholder 3" svg:x="4.24826in" svg:y="9.49826in" svg:width="3.25in" svg:height="0.50174in">
            <draw:text-box>
              <text:p text:style-name="a1117" text:class-names="" text:cond-style-name=""><text:span text:style-name="a1115" text:class-names=""><text:page-number style:num-format="1" text:fixed="false"/></text:span><text:span text:style-name="a1116" text:class-names=""/></text:p>
            </draw:text-box>
            <svg:title/>
            <svg:desc/>
          </draw:frame>
        </presentation:notes>
      </draw:page>
      <draw:page draw:name="Slide23" draw:style-name="a1120" draw:master-page-name="Master1-Layout7-blank-Blank" presentation:presentation-page-layout-name="Master1-PPL7" draw:id="Slide-278">
        <draw:frame draw:id="id124" draw:style-name="a1121" draw:name="Picture 2" svg:x="0in" svg:y="0in" svg:width="3.32999in" svg:height="6.27894in" style:rel-width="scale" style:rel-height="scale">
          <draw:image xlink:href="media/image12.png" xlink:type="simple" xlink:show="embed" xlink:actuate="onLoad"/>
          <svg:title/>
          <svg:desc/>
        </draw:frame>
        <draw:frame draw:id="id125" draw:style-name="a1122" draw:name="Picture 4" svg:x="3.32999in" svg:y="0in" svg:width="2.99307in" svg:height="6.27894in" style:rel-width="scale" style:rel-height="scale">
          <draw:image xlink:href="media/image13.png" xlink:type="simple" xlink:show="embed" xlink:actuate="onLoad"/>
          <svg:title/>
          <svg:desc/>
        </draw:frame>
        <draw:frame draw:id="id126" draw:style-name="a1128" draw:name="TextBox 13" svg:x="0in" svg:y="6.27894in" svg:width="6.67544in" svg:height="0.70684in">
          <draw:text-box>
            <text:p text:style-name="a1127" text:class-names="" text:cond-style-name=""><text:span text:style-name="a1123" text:class-names="">Figure<text:s text:c="1"/></text:span><text:span text:style-name="a1124" text:class-names="">10</text:span><text:span text:style-name="a1125" text:class-names="">:</text:span><text:span text:style-name="a1126" text:class-names=""><text:s text:c="1"/>Operations and Marketing policies correctly attached</text:span></text:p>
          </draw:text-box>
          <svg:title/>
          <svg:desc/>
        </draw:frame>
        <draw:frame draw:id="id127" draw:style-name="a1149" draw:name="Content Placeholder 2" svg:x="6.71793in" svg:y="1.7in" svg:width="6.60173in" svg:height="5.8in">
          <draw:text-box>
            <text:list text:style-name="a1132">
              <text:list-item>
                <text:p text:style-name="a1131" text:class-names="" text:cond-style-name=""><text:span text:style-name="a1129" text:class-names="">Fixing the actual mistake:</text:span><text:span text:style-name="a1130" text:class-names=""><text:s text:c="1"/>Simple, just swap the policies attached between both department groups so that they can perform their operations.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Also, make sure you haven’t overprivileged any users or departments</text:span><text:span text:style-name="a1134" text:class-names="">; this can also compromise the system or carry risk of insider threats like Ubuntu.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Practices within the work environment: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Test access using user accounts to verify that permissions match job responsibilities.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Periodic Reviews of assigned user privileges for each employee to determine if they have the necessary amount to perform their respective operations (Joint Task Force, 2020).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If unnecessary permission is identified, remove that error immediately.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153" draw:name="Title 1" svg:x="6.64871in" svg:y="0in" svg:width="6.67095in" svg:height="1.7in">
          <draw:text-box>
            <text:p text:style-name="a1152" text:class-names="" text:cond-style-name=""><text:span text:style-name="a1150" text:class-names="">Solutions for preventing exploitation: Practices within the work environment</text:span><text:span text:style-name="a1151" text:class-names=""/></text:p>
          </draw:text-box>
          <svg:title/>
          <svg:desc/>
        </draw:frame>
      </draw:page>
      <draw:page draw:name="Slide12" draw:style-name="a1154" draw:master-page-name="Master1-Layout2-obj-Title-and-Content" presentation:presentation-page-layout-name="Master1-PPL2" draw:id="Slide-267">
        <draw:frame draw:id="id129" presentation:style-name="a1158" draw:name="Title 1" svg:x="0.91667in" svg:y="0.39931in" svg:width="11.5in" svg:height="1.44965in" presentation:class="title" presentation:placeholder="false">
          <draw:text-box>
            <text:p text:style-name="a1157" text:class-names="" text:cond-style-name=""><text:span text:style-name="a1155" text:class-names="">Summary</text:span><text:span text:style-name="a1156" text:class-names=""/></text:p>
          </draw:text-box>
          <svg:title/>
          <svg:desc/>
        </draw:frame>
        <draw:frame draw:id="id130" presentation:style-name="a1182" draw:name="Content Placeholder 2" svg:x="0.91667in" svg:y="1.99653in" svg:width="11.5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Privilege Management is the management of access to resources by permitted authorised users based on their responsibilities.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It can be implemented incorrectly by giving users incorrect privileges or over-privileges that are completely unnecessary.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Using Ubuntu, we discovered that over-privileges could compromise the confidentiality, integrity and accessibility of a business’s system.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In AWS, we discovered that department functions and users can be disrupted if not assigned the correct policies.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1" text:class-names="">Also ensure that you have<text:s text:c="1"/></text:span><text:span text:style-name="a1172" text:class-names="">justifiably</text:span><text:span text:style-name="a1173" text:class-names=""><text:s text:c="1"/>assigned the correct necessary privileges for each department and user.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If you are unsure, perform trials to verify that the permissions are set correctly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If you spot any errors, remove them with immediate effect.</text:span></text:p>
              </text:list-item>
            </text:list>
          </draw:text-box>
          <svg:title/>
          <svg:desc/>
        </draw:frame>
      </draw:page>
      <draw:page draw:name="Slide14" draw:style-name="a1183" draw:master-page-name="Master1-Layout2-obj-Title-and-Content" presentation:presentation-page-layout-name="Master1-PPL2" draw:id="Slide-269">
        <draw:frame draw:id="id131" presentation:style-name="a1187" draw:name="Title 1" svg:x="0in" svg:y="0.01997in" svg:width="13.33333in" svg:height="1.22565in" presentation:class="title" presentation:placeholder="false">
          <draw:text-box>
            <text:p text:style-name="a1186" text:class-names="" text:cond-style-name=""><text:span text:style-name="a1184" text:class-names="">References</text:span><text:span text:style-name="a1185" text:class-names=""/></text:p>
          </draw:text-box>
          <svg:title/>
          <svg:desc/>
        </draw:frame>
        <draw:frame draw:id="id132" presentation:style-name="a1223" draw:name="Content Placeholder 2" svg:x="0in" svg:y="1.24561in" svg:width="13.33333in" svg:height="6.12934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88" text:class-names="">Joint Task Force (2020). Security and Privacy Controls for Information Systems and Organizations.<text:s text:c="1"/></text:span><text:span text:style-name="a1189" text:class-names="">Security and Privacy Controls for Information Systems and Organizations</text:span><text:span text:style-name="a1190" text:class-names="">, [online] 5(5). doi:https://doi.org/10.6028/nist.sp.800-53r5.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3" text:class-names="">Verizon (2024).<text:s text:c="1"/></text:span><text:span text:style-name="a1194" text:class-names="">2024 Data Breach Investigations Report</text:span><text:span text:style-name="a1195" text:class-names="">. [online] Verizon Enterprise Solutions. Available at: https://www.verizon.com/business/resources/reports/2024-dbir-data-breach-investigations-report.pdf.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198" text:class-names="">www.ssh.com. (n.d.).<text:s text:c="1"/></text:span><text:span text:style-name="a1199" text:class-names="">What is a Root User Account? How to Root Phones?</text:span><text:span text:style-name="a1200" text:class-names=""><text:s text:c="1"/>[online] Available at:<text:s text:c="1"/></text:span><text:span text:style-name="a1201" text:class-names=""><text:a xlink:href="https://www.ssh.com/academy/pam/root-user-account" text:style-name="" text:visited-style-name="">https://www.ssh.com/academy/pam/root-user-account</text:a></text:span><text:span text:style-name="a1202" text:class-names="">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Swif.ai. (2026). Available at: https://www.swif.ai/blog/insider-threat-cyber-security-statistics.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08" text:class-names="">www.ncsc.gov.uk. (n.d.).<text:s text:c="1"/></text:span><text:span text:style-name="a1209" text:class-names="">Use privileged access management</text:span><text:span text:style-name="a1210" text:class-names="">. [online] Available at: https://www.ncsc.gov.uk/collection/secure-system-administration/use-privileged-access-management.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3" text:class-names="">Amazon Web Services (2024).<text:s text:c="1"/></text:span><text:span text:style-name="a1214" text:class-names="">AWS Identity &amp; Access Management</text:span><text:span text:style-name="a1215" text:class-names="">. [online] Amazon Web Services, Inc. Available at:<text:s text:c="1"/></text:span><text:span text:style-name="a1216" text:class-names=""><text:a xlink:href="https://aws.amazon.com/iam/" text:style-name="" text:visited-style-name="">https://aws.amazon.com/iam/</text:a></text:span><text:span text:style-name="a1217" text:class-names="">.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/05/202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30/05/2026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0/05/2026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0/05/2026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0/05/2026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30/05/2026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30/05/2026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30/05/2026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30/05/2026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30/05/2026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30/05/2026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30/05/2026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30/05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yman Boucheneb</meta:initial-creator>
    <dc:creator>Ayman Boucheneb</dc:creator>
    <meta:creation-date>2026-05-26T09:28:22Z</meta:creation-date>
    <dc:date>2026-05-30T09:49:15Z</dc:date>
    <meta:editing-cycles>33</meta:editing-cycles>
    <meta:editing-duration>PT68078S</meta:editing-duration>
    <meta:document-statistic meta:paragraph-count="96" meta:word-count="1851"/>
  </office:meta>
</office:document-meta>
</file>